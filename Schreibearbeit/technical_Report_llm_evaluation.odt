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171cm" fo:margin-left="-0.053cm" fo:margin-top="0cm" fo:margin-bottom="0cm" table:align="left" style:writing-mode="page"/>
    </style:style>
    <style:style style:name="Table1.A" style:family="table-column">
      <style:table-column-properties style:column-width="2.21cm"/>
    </style:style>
    <style:style style:name="Table1.B" style:family="table-column">
      <style:table-column-properties style:column-width="2.124cm"/>
    </style:style>
    <style:style style:name="Table1.C" style:family="table-column">
      <style:table-column-properties style:column-width="2.032cm"/>
    </style:style>
    <style:style style:name="Table1.D" style:family="table-column">
      <style:table-column-properties style:column-width="1.496cm"/>
    </style:style>
    <style:style style:name="Table1.E" style:family="table-column">
      <style:table-column-properties style:column-width="1.517cm"/>
    </style:style>
    <style:style style:name="Table1.F" style:family="table-column">
      <style:table-column-properties style:column-width="1.875cm"/>
    </style:style>
    <style:style style:name="Table1.G" style:family="table-column">
      <style:table-column-properties style:column-width="2.397cm"/>
    </style:style>
    <style:style style:name="Table1.H" style:family="table-column">
      <style:table-column-properties style:column-width="1.633cm"/>
    </style:style>
    <style:style style:name="Table1.I" style:family="table-column">
      <style:table-column-properties style:column-width="1.887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7.171cm" fo:margin-left="-0.053cm" fo:margin-top="0cm" fo:margin-bottom="0cm" table:align="left" style:writing-mode="page"/>
    </style:style>
    <style:style style:name="Table2.A" style:family="table-column">
      <style:table-column-properties style:column-width="2.21cm"/>
    </style:style>
    <style:style style:name="Table2.B" style:family="table-column">
      <style:table-column-properties style:column-width="1.725cm"/>
    </style:style>
    <style:style style:name="Table2.C" style:family="table-column">
      <style:table-column-properties style:column-width="1.857cm"/>
    </style:style>
    <style:style style:name="Table2.D" style:family="table-column">
      <style:table-column-properties style:column-width="1.806cm"/>
    </style:style>
    <style:style style:name="Table2.E" style:family="table-column">
      <style:table-column-properties style:column-width="1.78cm"/>
    </style:style>
    <style:style style:name="Table2.F" style:family="table-column">
      <style:table-column-properties style:column-width="1.288cm"/>
    </style:style>
    <style:style style:name="Table2.G" style:family="table-column">
      <style:table-column-properties style:column-width="2.023cm"/>
    </style:style>
    <style:style style:name="Table2.H" style:family="table-column">
      <style:table-column-properties style:column-width="2.595cm"/>
    </style:style>
    <style:style style:name="Table2.I" style:family="table-column">
      <style:table-column-properties style:column-width="1.887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3" style:family="table">
      <style:table-properties style:width="17.171cm" fo:margin-left="-0.053cm" fo:margin-top="0cm" fo:margin-bottom="0cm" table:align="left" style:writing-mode="page"/>
    </style:style>
    <style:style style:name="Table3.A" style:family="table-column">
      <style:table-column-properties style:column-width="2.21cm"/>
    </style:style>
    <style:style style:name="Table3.B" style:family="table-column">
      <style:table-column-properties style:column-width="1.725cm"/>
    </style:style>
    <style:style style:name="Table3.C" style:family="table-column">
      <style:table-column-properties style:column-width="1.857cm"/>
    </style:style>
    <style:style style:name="Table3.D" style:family="table-column">
      <style:table-column-properties style:column-width="1.806cm"/>
    </style:style>
    <style:style style:name="Table3.E" style:family="table-column">
      <style:table-column-properties style:column-width="1.78cm"/>
    </style:style>
    <style:style style:name="Table3.F" style:family="table-column">
      <style:table-column-properties style:column-width="1.288cm"/>
    </style:style>
    <style:style style:name="Table3.G" style:family="table-column">
      <style:table-column-properties style:column-width="2.023cm"/>
    </style:style>
    <style:style style:name="Table3.H" style:family="table-column">
      <style:table-column-properties style:column-width="2.595cm"/>
    </style:style>
    <style:style style:name="Table3.I" style:family="table-column">
      <style:table-column-properties style:column-width="1.887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4" style:family="table">
      <style:table-properties style:width="16.409cm" fo:margin-left="-0.053cm" fo:margin-top="0cm" fo:margin-bottom="0cm" table:align="left" style:writing-mode="page"/>
    </style:style>
    <style:style style:name="Table4.A" style:family="table-column">
      <style:table-column-properties style:column-width="1.669cm"/>
    </style:style>
    <style:style style:name="Table4.B" style:family="table-column">
      <style:table-column-properties style:column-width="1.993cm"/>
    </style:style>
    <style:style style:name="Table4.C" style:family="table-column">
      <style:table-column-properties style:column-width="2.09cm"/>
    </style:style>
    <style:style style:name="Table4.D" style:family="table-column">
      <style:table-column-properties style:column-width="1.61cm"/>
    </style:style>
    <style:style style:name="Table4.E" style:family="table-column">
      <style:table-column-properties style:column-width="1.254cm"/>
    </style:style>
    <style:style style:name="Table4.F" style:family="table-column">
      <style:table-column-properties style:column-width="1.947cm"/>
    </style:style>
    <style:style style:name="Table4.G" style:family="table-column">
      <style:table-column-properties style:column-width="2.129cm"/>
    </style:style>
    <style:style style:name="Table4.H" style:family="table-column">
      <style:table-column-properties style:column-width="1.829cm"/>
    </style:style>
    <style:style style:name="Table4.I" style:family="table-column">
      <style:table-column-properties style:column-width="1.887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P1" style:family="paragraph" style:parent-style-name="Preformatted_20_Text">
      <style:paragraph-properties fo:margin-top="0cm" fo:margin-bottom="0.499cm" style:contextual-spacing="false"/>
    </style:style>
    <style:style style:name="P2" style:family="paragraph" style:parent-style-name="Standard">
      <style:text-properties officeooo:rsid="00003bef" officeooo:paragraph-rsid="00003bef"/>
    </style:style>
    <style:style style:name="P3" style:family="paragraph" style:parent-style-name="Standard">
      <style:text-properties fo:font-weight="bold" officeooo:rsid="00003bef" officeooo:paragraph-rsid="00003bef" style:font-weight-asian="bold" style:font-weight-complex="bold"/>
    </style:style>
    <style:style style:name="P4" style:family="paragraph" style:parent-style-name="Standard">
      <style:paragraph-properties fo:break-before="page"/>
    </style:style>
    <style:style style:name="P5" style:family="paragraph" style:parent-style-name="Standard">
      <style:text-properties officeooo:rsid="00008fff" officeooo:paragraph-rsid="00008fff"/>
    </style:style>
    <style:style style:name="P6" style:family="paragraph" style:parent-style-name="Standard">
      <style:paragraph-properties fo:break-before="page"/>
      <style:text-properties officeooo:rsid="00008fff" officeooo:paragraph-rsid="00008fff"/>
    </style:style>
    <style:style style:name="P7" style:family="paragraph" style:parent-style-name="Standard">
      <style:paragraph-properties fo:text-align="start" style:justify-single-word="false">
        <style:tab-stops/>
      </style:paragraph-properties>
      <style:text-properties style:font-name="Liberation Sans" fo:font-weight="bold" style:font-weight-asian="bold" style:font-weight-complex="bold"/>
    </style:style>
    <style:style style:name="P8" style:family="paragraph" style:parent-style-name="Standard">
      <style:paragraph-properties fo:text-align="start" style:justify-single-word="false">
        <style:tab-stops/>
      </style:paragraph-properties>
      <style:text-properties style:font-name="Liberation Sans"/>
    </style:style>
    <style:style style:name="P9" style:family="paragraph" style:parent-style-name="Standard">
      <style:paragraph-properties fo:text-align="end" style:justify-single-word="false">
        <style:tab-stops/>
      </style:paragraph-properties>
      <style:text-properties style:font-name="Liberation Sans"/>
    </style:style>
    <style:style style:name="T1" style:family="text">
      <style:text-properties officeooo:rsid="0006a3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bmts:</text:p>
      <text:p text:style-name="P3">Seperate:</text:p>
      <text:p text:style-name="P3"/>
      <text:p text:style-name="P3">Task:</text:p>
      <text:p text:style-name="P3"/>
      <text:p text:style-name="P2">"system", """Du bist ein Klassifikationssystem. Analysiere das folgende Chat-Log und bestimme,</text:p>
      <text:p text:style-name="P2">welcher Aufgabentyp vorliegt.</text:p>
      <text:p text:style-name="P2"/>
      <text:p text:style-name="P2">Aufgabentypen:</text:p>
      <text:p text:style-name="P2">(1) Informationssuche und Verständnis – z.B. Literaturhinweise, Begriffe erklären, Verständnisfragen</text:p>
      <text:p text:style-name="P2">(2) Schreiben und Textarbeit – z.B. Feedback, Gliederungen, Zusammenfassungen, Übersetzungen</text:p>
      <text:p text:style-name="P2">(3) Praktische Unterstützung und Strukturierung – z.B. Ideen entwickeln, Projekte strukturieren, Planung</text:p>
      <text:p text:style-name="P2">(4) Technische und analytische Unterstützung – z.B. Code, Datenanalyse, Statistik (R/SPSS/Stata)</text:p>
      <text:p text:style-name="P2">(5) Lernen und Prüfungsvorbereitung – z.B. Prüfungsvorbereitung, Lernfragen, Karteikarten</text:p>
      <text:p text:style-name="P2"/>
      <text:p text:style-name="P2">Antworte NUR mit EINEM der folgenden Labels (exakt so):</text:p>
      <text:p text:style-name="P2">{labels}"""),</text:p>
      <text:p text:style-name="P2">"human", "Chat-Log:\n{text}\n\nLabel:"</text:p>
      <text:p text:style-name="P2"/>
      <text:p text:style-name="P3">Sentiment:</text:p>
      <text:p text:style-name="P2">"system", """Du bist ein Klassifikationssystem. Analysiere den Ton des folgenden Chat-Logs.</text:p>
      <text:p text:style-name="P2"/>
      <text:p text:style-name="P2">Bewerte den Ton als:</text:p>
      <text:p text:style-name="P2">- Unfreundlich: abweisend, fordernd, ungeduldig</text:p>
      <text:p text:style-name="P2">- Neutral: sachlich, nüchtern, aufgabenorientiert</text:p>
      <text:p text:style-name="P2">- Freundlich: höflich, wertschätzend, kooperativ</text:p>
      <text:p text:style-name="P2"/>
      <text:p text:style-name="P2">Antworte NUR mit EINEM der folgenden Labels (exakt so):</text:p>
      <text:p text:style-name="P2">{labels}"""),</text:p>
      <text:p text:style-name="P2"><text:s text:c="4"/>("human", "Chat-Log:\n{text}\n\nLabel:"),</text:p>
      <text:p text:style-name="P2">]).partial(labels=" | ".join(LABELS_SENTIMENT))</text:p>
      <text:p text:style-name="P2"/>
      <text:p text:style-name="P3">Nachfragen:</text:p>
      <text:p text:style-name="P2">"system", """Du bist ein Klassifikationssystem. Analysiere das folgende Chat-Log.</text:p>
      <text:p text:style-name="P2"/>
      <text:p text:style-name="P2">Fragt die Person ChatGPT nach Hinweisen zur Überprüfung der Antwort,</text:p>
      <text:p text:style-name="P2">z.B. Quellen, Belege, Gegenargumente oder einer Prüfung auf mögliche Fehler?</text:p>
      <text:p text:style-name="P2"/>
      <text:p text:style-name="P2">Antworte NUR mit EINEM der folgenden Labels (exakt so):</text:p>
      <text:p text:style-name="P2">{labels}"""),</text:p>
      <text:p text:style-name="P2"><text:s text:c="4"/>("human", "Chat-Log:\n{text}\n\nLabel:"),</text:p>
      <text:p text:style-name="P2"/>
      <text:p text:style-name="P2"/>
      <text:p text:style-name="P3">Combined Prompt</text:p>
      <text:p text:style-name="P2">prompt_combined = ChatPromptTemplate.from_messages([</text:p>
      <text:p text:style-name="P2"><text:s text:c="4"/>("system", """Du bist ein Klassifikationssystem für akademische Chat-Logs.</text:p>
      <text:p text:style-name="P2">Analysiere das folgende Chat-Log und klassifiziere es nach drei Kriterien.</text:p>
      <text:p text:style-name="P2"/>
      <text:p text:style-name="P2">KRITERIUM 1 – Aufgabentyp:</text:p>
      <text:p text:style-name="P2">(1) Informationssuche und Verständnis – z.B. Literaturhinweise, Begriffe erklären</text:p>
      <text:p text:style-name="P2"><text:soft-page-break/>(2) Schreiben und Textarbeit – z.B. Feedback, Gliederungen, Übersetzungen</text:p>
      <text:p text:style-name="P2">(3) Praktische Unterstützung und Strukturierung – z.B. Ideen entwickeln, Planung</text:p>
      <text:p text:style-name="P2">(4) Technische und analytische Unterstützung – z.B. Code, Datenanalyse, R/SPSS</text:p>
      <text:p text:style-name="P2">(5) Lernen und Prüfungsvorbereitung – z.B. Prüfungsvorbereitung, Karteikarten</text:p>
      <text:p text:style-name="P2"/>
      <text:p text:style-name="P2">KRITERIUM 2 – Ton/Sentiment:</text:p>
      <text:p text:style-name="P2">- Unfreundlich: abweisend, fordernd, ungeduldig</text:p>
      <text:p text:style-name="P2">- Neutral: sachlich, nüchtern, aufgabenorientiert</text:p>
      <text:p text:style-name="P2">- Freundlich: höflich, wertschätzend, kooperativ</text:p>
      <text:p text:style-name="P2"/>
      <text:p text:style-name="P2">KRITERIUM 3 – Kritische Überprüfung:</text:p>
      <text:p text:style-name="P2">Fragt die Person nach Quellen, Belegen, Gegenargumenten oder Fehlerprüfung?</text:p>
      <text:p text:style-name="P2">- Ja</text:p>
      <text:p text:style-name="P2">- Nein</text:p>
      <text:p text:style-name="P2"/>
      <text:p text:style-name="P2">Antworte NUR in diesem exakten Format (drei Zeilen, nichts anderes):</text:p>
      <text:p text:style-name="P2">TASK: &lt;Label&gt;</text:p>
      <text:p text:style-name="P2">SENTIMENT: &lt;Label&gt;</text:p>
      <text:p text:style-name="P2">CRITICAL: &lt;Label&gt;"""),</text:p>
      <text:p text:style-name="P2"><text:s text:c="4"/>("human", "Chat-Log:\n{text}"),</text:p>
      <text:p text:style-name="P2">])</text:p>
      <text:p text:style-name="P2"/>
      <text:p text:style-name="P2">print("Prompts definiert")</text:p>
      <text:p text:style-name="P2"/>
      <text:p text:style-name="P2"/>
      <text:p text:style-name="P2"/>
      <text:p text:style-name="P2">Tab. 1: Modell-Perfoman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7">Modell</text:p>
          </table:table-cell>
          <table:table-cell table:style-name="Table1.A1" office:value-type="string">
            <text:p text:style-name="P7">Strategie</text:p>
          </table:table-cell>
          <table:table-cell table:style-name="Table1.A1" office:value-type="string">
            <text:p text:style-name="P7">Aufgabe</text:p>
          </table:table-cell>
          <table:table-cell table:style-name="Table1.A1" office:value-type="string">
            <text:p text:style-name="P7">Accuracy</text:p>
          </table:table-cell>
          <table:table-cell table:style-name="Table1.A1" office:value-type="string">
            <text:p text:style-name="P7">Precision</text:p>
          </table:table-cell>
          <table:table-cell table:style-name="Table1.A1" office:value-type="string">
            <text:p text:style-name="P7">Recall</text:p>
          </table:table-cell>
          <table:table-cell table:style-name="Table1.A1" office:value-type="string">
            <text:p text:style-name="P7">F1 (macro)</text:p>
          </table:table-cell>
          <table:table-cell table:style-name="Table1.A1" office:value-type="string">
            <text:p text:style-name="P7">Unknown-Rate</text:p>
          </table:table-cell>
          <table:table-cell table:style-name="Table1.A1" office:value-type="string">
            <text:p text:style-name="P7">Latenz (s)</text:p>
          </table:table-cell>
        </table:table-row>
        <table:table-row table:style-name="Table1.1">
          <table:table-cell table:style-name="Table1.A1" office:value-type="string">
            <text:p text:style-name="P7">gpt-4.1</text:p>
          </table:table-cell>
          <table:table-cell table:style-name="Table1.A1" office:value-type="string">
            <text:p text:style-name="P8">combined</text:p>
          </table:table-cell>
          <table:table-cell table:style-name="Table1.A1" office:value-type="string">
            <text:p text:style-name="P8">critical</text:p>
          </table:table-cell>
          <table:table-cell table:style-name="Table1.A1" office:value-type="string">
            <text:p text:style-name="P8">0.76</text:p>
          </table:table-cell>
          <table:table-cell table:style-name="Table1.A1" office:value-type="string">
            <text:p text:style-name="P8">0.5536</text:p>
          </table:table-cell>
          <table:table-cell table:style-name="Table1.A1" office:value-type="string">
            <text:p text:style-name="P8">0.5536</text:p>
          </table:table-cell>
          <table:table-cell table:style-name="Table1.A1" office:value-type="string">
            <text:p text:style-name="P8">0.5536</text:p>
          </table:table-cell>
          <table:table-cell table:style-name="Table1.A1" office:value-type="string">
            <text:p text:style-name="P8">0.1667</text:p>
          </table:table-cell>
          <table:table-cell table:style-name="Table1.A1" office:value-type="string">
            <text:p text:style-name="P9">1572</text:p>
          </table:table-cell>
        </table:table-row>
        <table:table-row table:style-name="Table1.1">
          <table:table-cell table:style-name="Table1.A1" office:value-type="string">
            <text:p text:style-name="P7">gpt-4.1</text:p>
          </table:table-cell>
          <table:table-cell table:style-name="Table1.A1" office:value-type="string">
            <text:p text:style-name="P8">separate</text:p>
          </table:table-cell>
          <table:table-cell table:style-name="Table1.A1" office:value-type="string">
            <text:p text:style-name="P8">critical</text:p>
          </table:table-cell>
          <table:table-cell table:style-name="Table1.A1" office:value-type="string">
            <text:p text:style-name="P8">0.7857</text:p>
          </table:table-cell>
          <table:table-cell table:style-name="Table1.A1" office:value-type="string">
            <text:p text:style-name="P8">0.4231</text:p>
          </table:table-cell>
          <table:table-cell table:style-name="Table1.A1" office:value-type="string">
            <text:p text:style-name="P8">0.4583</text:p>
          </table:table-cell>
          <table:table-cell table:style-name="Table1.A1" office:value-type="string">
            <text:p text:style-name="P8">0.44</text:p>
          </table:table-cell>
          <table:table-cell table:style-name="Table1.A1" office:value-type="string">
            <text:p text:style-name="P8">0.0667</text:p>
          </table:table-cell>
          <table:table-cell table:style-name="Table1.A1" office:value-type="string">
            <text:p text:style-name="P9">1259</text:p>
          </table:table-cell>
        </table:table-row>
        <table:table-row table:style-name="Table1.1">
          <table:table-cell table:style-name="Table1.A1" office:value-type="string">
            <text:p text:style-name="P7">gpt-4.1</text:p>
          </table:table-cell>
          <table:table-cell table:style-name="Table1.A1" office:value-type="string">
            <text:p text:style-name="P8">combined</text:p>
          </table:table-cell>
          <table:table-cell table:style-name="Table1.A1" office:value-type="string">
            <text:p text:style-name="P8">sentiment</text:p>
          </table:table-cell>
          <table:table-cell table:style-name="Table1.A1" office:value-type="string">
            <text:p text:style-name="P8">0.84</text:p>
          </table:table-cell>
          <table:table-cell table:style-name="Table1.A1" office:value-type="string">
            <text:p text:style-name="P8">0.6232</text:p>
          </table:table-cell>
          <table:table-cell table:style-name="Table1.A1" office:value-type="string">
            <text:p text:style-name="P8">0.4841</text:p>
          </table:table-cell>
          <table:table-cell table:style-name="Table1.A1" office:value-type="string">
            <text:p text:style-name="P8">0.5253</text:p>
          </table:table-cell>
          <table:table-cell table:style-name="Table1.A1" office:value-type="string">
            <text:p text:style-name="P8">0.1667</text:p>
          </table:table-cell>
          <table:table-cell table:style-name="Table1.A1" office:value-type="string">
            <text:p text:style-name="P9">1572</text:p>
          </table:table-cell>
        </table:table-row>
        <table:table-row table:style-name="Table1.1">
          <table:table-cell table:style-name="Table1.A1" office:value-type="string">
            <text:p text:style-name="P7">gpt-4.1</text:p>
          </table:table-cell>
          <table:table-cell table:style-name="Table1.A1" office:value-type="string">
            <text:p text:style-name="P8">separate</text:p>
          </table:table-cell>
          <table:table-cell table:style-name="Table1.A1" office:value-type="string">
            <text:p text:style-name="P8">sentiment</text:p>
          </table:table-cell>
          <table:table-cell table:style-name="Table1.A1" office:value-type="string">
            <text:p text:style-name="P8">0.7143</text:p>
          </table:table-cell>
          <table:table-cell table:style-name="Table1.A1" office:value-type="string">
            <text:p text:style-name="P9">375</text:p>
          </table:table-cell>
          <table:table-cell table:style-name="Table1.A1" office:value-type="string">
            <text:p text:style-name="P8">0.4545</text:p>
          </table:table-cell>
          <table:table-cell table:style-name="Table1.A1" office:value-type="string">
            <text:p text:style-name="P8">0.4087</text:p>
          </table:table-cell>
          <table:table-cell table:style-name="Table1.A1" office:value-type="string">
            <text:p text:style-name="P8">0.0667</text:p>
          </table:table-cell>
          <table:table-cell table:style-name="Table1.A1" office:value-type="string">
            <text:p text:style-name="P9">785</text:p>
          </table:table-cell>
        </table:table-row>
        <table:table-row table:style-name="Table1.1">
          <table:table-cell table:style-name="Table1.A1" office:value-type="string">
            <text:p text:style-name="P7">gpt-4.1</text:p>
          </table:table-cell>
          <table:table-cell table:style-name="Table1.A1" office:value-type="string">
            <text:p text:style-name="P8">combined</text:p>
          </table:table-cell>
          <table:table-cell table:style-name="Table1.A1" office:value-type="string">
            <text:p text:style-name="P8">task_type</text:p>
          </table:table-cell>
          <table:table-cell table:style-name="Table1.A1" office:value-type="string">
            <text:p text:style-name="P8">0.72</text:p>
          </table:table-cell>
          <table:table-cell table:style-name="Table1.A1" office:value-type="string">
            <text:p text:style-name="P8">0.3</text:p>
          </table:table-cell>
          <table:table-cell table:style-name="Table1.A1" office:value-type="string">
            <text:p text:style-name="P8">0.3346</text:p>
          </table:table-cell>
          <table:table-cell table:style-name="Table1.A1" office:value-type="string">
            <text:p text:style-name="P8">0.3155</text:p>
          </table:table-cell>
          <table:table-cell table:style-name="Table1.A1" office:value-type="string">
            <text:p text:style-name="P8">0.1667</text:p>
          </table:table-cell>
          <table:table-cell table:style-name="Table1.A1" office:value-type="string">
            <text:p text:style-name="P9">1572</text:p>
          </table:table-cell>
        </table:table-row>
        <table:table-row table:style-name="Table1.1">
          <table:table-cell table:style-name="Table1.A1" office:value-type="string">
            <text:p text:style-name="P7">gpt-4.1</text:p>
          </table:table-cell>
          <table:table-cell table:style-name="Table1.A1" office:value-type="string">
            <text:p text:style-name="P8">separate</text:p>
          </table:table-cell>
          <table:table-cell table:style-name="Table1.A1" office:value-type="string">
            <text:p text:style-name="P8">task_type</text:p>
          </table:table-cell>
          <table:table-cell table:style-name="Table1.A1" office:value-type="string">
            <text:p text:style-name="P8">0.7333</text:p>
          </table:table-cell>
          <table:table-cell table:style-name="Table1.A1" office:value-type="string">
            <text:p text:style-name="P9">407</text:p>
          </table:table-cell>
          <table:table-cell table:style-name="Table1.A1" office:value-type="string">
            <text:p text:style-name="P8">0.42</text:p>
          </table:table-cell>
          <table:table-cell table:style-name="Table1.A1" office:value-type="string">
            <text:p text:style-name="P8">0.4086</text:p>
          </table:table-cell>
          <table:table-cell table:style-name="Table1.A1" office:value-type="string">
            <text:p text:style-name="P8">0.0</text:p>
          </table:table-cell>
          <table:table-cell table:style-name="Table1.A1" office:value-type="string">
            <text:p text:style-name="P9">452</text:p>
          </table:table-cell>
        </table:table-row>
        <table:table-row table:style-name="Table1.1">
          <table:table-cell table:style-name="Table1.A1" office:value-type="string">
            <text:p text:style-name="P7">gpt-4o-mini</text:p>
          </table:table-cell>
          <table:table-cell table:style-name="Table1.A1" office:value-type="string">
            <text:p text:style-name="P8">combined</text:p>
          </table:table-cell>
          <table:table-cell table:style-name="Table1.A1" office:value-type="string">
            <text:p text:style-name="P8">critical</text:p>
          </table:table-cell>
          <table:table-cell table:style-name="Table1.A1" office:value-type="string">
            <text:p text:style-name="P8">0.6429</text:p>
          </table:table-cell>
          <table:table-cell table:style-name="Table1.A1" office:value-type="string">
            <text:p text:style-name="P8">0.4762</text:p>
          </table:table-cell>
          <table:table-cell table:style-name="Table1.A1" office:value-type="string">
            <text:p text:style-name="P8">0.4696</text:p>
          </table:table-cell>
          <table:table-cell table:style-name="Table1.A1" office:value-type="string">
            <text:p text:style-name="P8">0.4697</text:p>
          </table:table-cell>
          <table:table-cell table:style-name="Table1.A1" office:value-type="string">
            <text:p text:style-name="P8">0.0667</text:p>
          </table:table-cell>
          <table:table-cell table:style-name="Table1.A1" office:value-type="string">
            <text:p text:style-name="P9">566</text:p>
          </table:table-cell>
        </table:table-row>
        <table:table-row table:style-name="Table1.1">
          <table:table-cell table:style-name="Table1.A1" office:value-type="string">
            <text:p text:style-name="P7">gpt-4o-mini</text:p>
          </table:table-cell>
          <table:table-cell table:style-name="Table1.A1" office:value-type="string">
            <text:p text:style-name="P8">separate</text:p>
          </table:table-cell>
          <table:table-cell table:style-name="Table1.A1" office:value-type="string">
            <text:p text:style-name="P8">critical</text:p>
          </table:table-cell>
          <table:table-cell table:style-name="Table1.A1" office:value-type="string">
            <text:p text:style-name="P8">0.7</text:p>
          </table:table-cell>
          <table:table-cell table:style-name="Table1.A1" office:value-type="string">
            <text:p text:style-name="P8">0.3889</text:p>
          </table:table-cell>
          <table:table-cell table:style-name="Table1.A1" office:value-type="string">
            <text:p text:style-name="P8">0.4375</text:p>
          </table:table-cell>
          <table:table-cell table:style-name="Table1.A1" office:value-type="string">
            <text:p text:style-name="P8">0.4118</text:p>
          </table:table-cell>
          <table:table-cell table:style-name="Table1.A1" office:value-type="string">
            <text:p text:style-name="P8">0.0</text:p>
          </table:table-cell>
          <table:table-cell table:style-name="Table1.A1" office:value-type="string">
            <text:p text:style-name="P9">524</text:p>
          </table:table-cell>
        </table:table-row>
        <table:table-row table:style-name="Table1.1">
          <table:table-cell table:style-name="Table1.A1" office:value-type="string">
            <text:p text:style-name="P7">gpt-4o-mini</text:p>
          </table:table-cell>
          <table:table-cell table:style-name="Table1.A1" office:value-type="string">
            <text:p text:style-name="P8">combined</text:p>
          </table:table-cell>
          <table:table-cell table:style-name="Table1.A1" office:value-type="string">
            <text:p text:style-name="P8">sentiment</text:p>
          </table:table-cell>
          <table:table-cell table:style-name="Table1.A1" office:value-type="string">
            <text:p text:style-name="P8">0.8333</text:p>
          </table:table-cell>
          <table:table-cell table:style-name="Table1.A1" office:value-type="string">
            <text:p text:style-name="P8">0.7933</text:p>
          </table:table-cell>
          <table:table-cell table:style-name="Table1.A1" office:value-type="string">
            <text:p text:style-name="P8">0.6389</text:p>
          </table:table-cell>
          <table:table-cell table:style-name="Table1.A1" office:value-type="string">
            <text:p text:style-name="P8">0.6882</text:p>
          </table:table-cell>
          <table:table-cell table:style-name="Table1.A1" office:value-type="string">
            <text:p text:style-name="P8">0.0</text:p>
          </table:table-cell>
          <table:table-cell table:style-name="Table1.A1" office:value-type="string">
            <text:p text:style-name="P9">566</text:p>
          </table:table-cell>
        </table:table-row>
        <table:table-row table:style-name="Table1.1">
          <table:table-cell table:style-name="Table1.A1" office:value-type="string">
            <text:p text:style-name="P7">gpt-4o-mini</text:p>
          </table:table-cell>
          <table:table-cell table:style-name="Table1.A1" office:value-type="string">
            <text:p text:style-name="P8">separate</text:p>
          </table:table-cell>
          <table:table-cell table:style-name="Table1.A1" office:value-type="string">
            <text:p text:style-name="P8">sentiment</text:p>
          </table:table-cell>
          <table:table-cell table:style-name="Table1.A1" office:value-type="string">
            <text:p text:style-name="P8">0.6</text:p>
          </table:table-cell>
          <table:table-cell table:style-name="Table1.A1" office:value-type="string">
            <text:p text:style-name="P8">0.3069</text:p>
          </table:table-cell>
          <table:table-cell table:style-name="Table1.A1" office:value-type="string">
            <text:p text:style-name="P8">0.4028</text:p>
          </table:table-cell>
          <table:table-cell table:style-name="Table1.A1" office:value-type="string">
            <text:p text:style-name="P8">0.3125</text:p>
          </table:table-cell>
          <table:table-cell table:style-name="Table1.A1" office:value-type="string">
            <text:p text:style-name="P8">0.0</text:p>
          </table:table-cell>
          <table:table-cell table:style-name="Table1.A1" office:value-type="string">
            <text:p text:style-name="P8">0.47</text:p>
          </table:table-cell>
        </table:table-row>
        <table:table-row table:style-name="Table1.1">
          <table:table-cell table:style-name="Table1.A1" office:value-type="string">
            <text:p text:style-name="P7">gpt-4o-mini</text:p>
          </table:table-cell>
          <table:table-cell table:style-name="Table1.A1" office:value-type="string">
            <text:p text:style-name="P8">combined</text:p>
          </table:table-cell>
          <table:table-cell table:style-name="Table1.A1" office:value-type="string">
            <text:p text:style-name="P8">task_type</text:p>
          </table:table-cell>
          <table:table-cell table:style-name="Table1.A1" office:value-type="string">
            <text:p text:style-name="P8">0.7333</text:p>
          </table:table-cell>
          <table:table-cell table:style-name="Table1.A1" office:value-type="string">
            <text:p text:style-name="P8">0.4167</text:p>
          </table:table-cell>
          <table:table-cell table:style-name="Table1.A1" office:value-type="string">
            <text:p text:style-name="P8">0.3922</text:p>
          </table:table-cell>
          <table:table-cell table:style-name="Table1.A1" office:value-type="string">
            <text:p text:style-name="P8">0.4025</text:p>
          </table:table-cell>
          <table:table-cell table:style-name="Table1.A1" office:value-type="string">
            <text:p text:style-name="P8">0.0</text:p>
          </table:table-cell>
          <table:table-cell table:style-name="Table1.A1" office:value-type="string">
            <text:p text:style-name="P9">566</text:p>
          </table:table-cell>
        </table:table-row>
        <table:table-row table:style-name="Table1.1">
          <table:table-cell table:style-name="Table1.A1" office:value-type="string">
            <text:p text:style-name="P7">gpt-4o-mini</text:p>
          </table:table-cell>
          <table:table-cell table:style-name="Table1.A1" office:value-type="string">
            <text:p text:style-name="P8">separate</text:p>
          </table:table-cell>
          <table:table-cell table:style-name="Table1.A1" office:value-type="string">
            <text:p text:style-name="P8">task_type</text:p>
          </table:table-cell>
          <table:table-cell table:style-name="Table1.A1" office:value-type="string">
            <text:p text:style-name="P8">0.7667</text:p>
          </table:table-cell>
          <table:table-cell table:style-name="Table1.A1" office:value-type="string">
            <text:p text:style-name="P8">0.4397</text:p>
          </table:table-cell>
          <table:table-cell table:style-name="Table1.A1" office:value-type="string">
            <text:p text:style-name="P8">0.4422</text:p>
          </table:table-cell>
          <table:table-cell table:style-name="Table1.A1" office:value-type="string">
            <text:p text:style-name="P8">0.4397</text:p>
          </table:table-cell>
          <table:table-cell table:style-name="Table1.A1" office:value-type="string">
            <text:p text:style-name="P8">0.0</text:p>
          </table:table-cell>
          <table:table-cell table:style-name="Table1.A1" office:value-type="string">
            <text:p text:style-name="P9">628</text:p>
          </table:table-cell>
        </table:table-row>
        <table:table-row table:style-name="Table1.1">
          <table:table-cell table:style-name="Table1.A1" office:value-type="string">
            <text:p text:style-name="P7">gpt-5.4-mini</text:p>
          </table:table-cell>
          <table:table-cell table:style-name="Table1.A1" office:value-type="string">
            <text:p text:style-name="P8">combined</text:p>
          </table:table-cell>
          <table:table-cell table:style-name="Table1.A1" office:value-type="string">
            <text:p text:style-name="P8">critical</text:p>
          </table:table-cell>
          <table:table-cell table:style-name="Table1.A1" office:value-type="string">
            <text:p text:style-name="P8">0.5667</text:p>
          </table:table-cell>
          <table:table-cell table:style-name="Table1.A1" office:value-type="string">
            <text:p text:style-name="P8">0.3696</text:p>
          </table:table-cell>
          <table:table-cell table:style-name="Table1.A1" office:value-type="string">
            <text:p text:style-name="P8">0.3542</text:p>
          </table:table-cell>
          <table:table-cell table:style-name="Table1.A1" office:value-type="string">
            <text:p text:style-name="P8">0.3617</text:p>
          </table:table-cell>
          <table:table-cell table:style-name="Table1.A1" office:value-type="string">
            <text:p text:style-name="P8">0.0</text:p>
          </table:table-cell>
          <table:table-cell table:style-name="Table1.A1" office:value-type="string">
            <text:p text:style-name="P9">717</text:p>
          </table:table-cell>
        </table:table-row>
        <table:table-row table:style-name="Table1.1">
          <table:table-cell table:style-name="Table1.A1" office:value-type="string">
            <text:p text:style-name="P7">gpt-5.4-mini</text:p>
          </table:table-cell>
          <table:table-cell table:style-name="Table1.A1" office:value-type="string">
            <text:p text:style-name="P8">separate</text:p>
          </table:table-cell>
          <table:table-cell table:style-name="Table1.A1" office:value-type="string">
            <text:p text:style-name="P8">critical</text:p>
          </table:table-cell>
          <table:table-cell table:style-name="Table1.A1" office:value-type="string">
            <text:p text:style-name="P8">0.7333</text:p>
          </table:table-cell>
          <table:table-cell table:style-name="Table1.A1" office:value-type="string">
            <text:p text:style-name="P8">0.5288</text:p>
          </table:table-cell>
          <table:table-cell table:style-name="Table1.A1" office:value-type="string">
            <text:p text:style-name="P8">0.5208</text:p>
          </table:table-cell>
          <table:table-cell table:style-name="Table1.A1" office:value-type="string">
            <text:p text:style-name="P8">0.52</text:p>
          </table:table-cell>
          <table:table-cell table:style-name="Table1.A1" office:value-type="string">
            <text:p text:style-name="P8">0.0</text:p>
          </table:table-cell>
          <table:table-cell table:style-name="Table1.A1" office:value-type="string">
            <text:p text:style-name="P9">734</text:p>
          </table:table-cell>
        </table:table-row>
        <text:soft-page-break/>
        <table:table-row table:style-name="Table1.1">
          <table:table-cell table:style-name="Table1.A1" office:value-type="string">
            <text:p text:style-name="P7">gpt-5.4-mini</text:p>
          </table:table-cell>
          <table:table-cell table:style-name="Table1.A1" office:value-type="string">
            <text:p text:style-name="P8">combined</text:p>
          </table:table-cell>
          <table:table-cell table:style-name="Table1.A1" office:value-type="string">
            <text:p text:style-name="P8">sentiment</text:p>
          </table:table-cell>
          <table:table-cell table:style-name="Table1.A1" office:value-type="string">
            <text:p text:style-name="P8">0.7667</text:p>
          </table:table-cell>
          <table:table-cell table:style-name="Table1.A1" office:value-type="string">
            <text:p text:style-name="P8">0.4133</text:p>
          </table:table-cell>
          <table:table-cell table:style-name="Table1.A1" office:value-type="string">
            <text:p text:style-name="P8">0.4583</text:p>
          </table:table-cell>
          <table:table-cell table:style-name="Table1.A1" office:value-type="string">
            <text:p text:style-name="P8">0.4339</text:p>
          </table:table-cell>
          <table:table-cell table:style-name="Table1.A1" office:value-type="string">
            <text:p text:style-name="P8">0.0</text:p>
          </table:table-cell>
          <table:table-cell table:style-name="Table1.A1" office:value-type="string">
            <text:p text:style-name="P9">717</text:p>
          </table:table-cell>
        </table:table-row>
        <table:table-row table:style-name="Table1.1">
          <table:table-cell table:style-name="Table1.A1" office:value-type="string">
            <text:p text:style-name="P7">gpt-5.4-mini</text:p>
          </table:table-cell>
          <table:table-cell table:style-name="Table1.A1" office:value-type="string">
            <text:p text:style-name="P8">separate</text:p>
          </table:table-cell>
          <table:table-cell table:style-name="Table1.A1" office:value-type="string">
            <text:p text:style-name="P8">sentiment</text:p>
          </table:table-cell>
          <table:table-cell table:style-name="Table1.A1" office:value-type="string">
            <text:p text:style-name="P8">0.7667</text:p>
          </table:table-cell>
          <table:table-cell table:style-name="Table1.A1" office:value-type="string">
            <text:p text:style-name="P8">0.5578</text:p>
          </table:table-cell>
          <table:table-cell table:style-name="Table1.A1" office:value-type="string">
            <text:p text:style-name="P8">0.5417</text:p>
          </table:table-cell>
          <table:table-cell table:style-name="Table1.A1" office:value-type="string">
            <text:p text:style-name="P8">0.5302</text:p>
          </table:table-cell>
          <table:table-cell table:style-name="Table1.A1" office:value-type="string">
            <text:p text:style-name="P8">0.0</text:p>
          </table:table-cell>
          <table:table-cell table:style-name="Table1.A1" office:value-type="string">
            <text:p text:style-name="P9">545</text:p>
          </table:table-cell>
        </table:table-row>
        <table:table-row table:style-name="Table1.1">
          <table:table-cell table:style-name="Table1.A1" office:value-type="string">
            <text:p text:style-name="P7">gpt-5.4-mini</text:p>
          </table:table-cell>
          <table:table-cell table:style-name="Table1.A1" office:value-type="string">
            <text:p text:style-name="P8">combined</text:p>
          </table:table-cell>
          <table:table-cell table:style-name="Table1.A1" office:value-type="string">
            <text:p text:style-name="P8">task_type</text:p>
          </table:table-cell>
          <table:table-cell table:style-name="Table1.A1" office:value-type="string">
            <text:p text:style-name="P8">0.7391</text:p>
          </table:table-cell>
          <table:table-cell table:style-name="Table1.A1" office:value-type="string">
            <text:p text:style-name="P8">0.62</text:p>
          </table:table-cell>
          <table:table-cell table:style-name="Table1.A1" office:value-type="string">
            <text:p text:style-name="P8">0.5444</text:p>
          </table:table-cell>
          <table:table-cell table:style-name="Table1.A1" office:value-type="string">
            <text:p text:style-name="P8">0.5557</text:p>
          </table:table-cell>
          <table:table-cell table:style-name="Table1.A1" office:value-type="string">
            <text:p text:style-name="P8">0.2333</text:p>
          </table:table-cell>
          <table:table-cell table:style-name="Table1.A1" office:value-type="string">
            <text:p text:style-name="P9">717</text:p>
          </table:table-cell>
        </table:table-row>
        <table:table-row table:style-name="Table1.1">
          <table:table-cell table:style-name="Table1.A1" office:value-type="string">
            <text:p text:style-name="P7">gpt-5.4-mini</text:p>
          </table:table-cell>
          <table:table-cell table:style-name="Table1.A1" office:value-type="string">
            <text:p text:style-name="P8">separate</text:p>
          </table:table-cell>
          <table:table-cell table:style-name="Table1.A1" office:value-type="string">
            <text:p text:style-name="P8">task_type</text:p>
          </table:table-cell>
          <table:table-cell table:style-name="Table1.A1" office:value-type="string">
            <text:p text:style-name="P8">0.7667</text:p>
          </table:table-cell>
          <table:table-cell table:style-name="Table1.A1" office:value-type="string">
            <text:p text:style-name="P8">0.4448</text:p>
          </table:table-cell>
          <table:table-cell table:style-name="Table1.A1" office:value-type="string">
            <text:p text:style-name="P8">0.5067</text:p>
          </table:table-cell>
          <table:table-cell table:style-name="Table1.A1" office:value-type="string">
            <text:p text:style-name="P8">0.4567</text:p>
          </table:table-cell>
          <table:table-cell table:style-name="Table1.A1" office:value-type="string">
            <text:p text:style-name="P8">0.0</text:p>
          </table:table-cell>
          <table:table-cell table:style-name="Table1.A1" office:value-type="string">
            <text:p text:style-name="P9">691</text:p>
          </table:table-cell>
        </table:table-row>
      </table:table>
      <text:p text:style-name="Standard"/>
      <text:p text:style-name="Preformatted_20_Text"/>
      <text:p text:style-name="Preformatted_20_Text"/>
      <text:p text:style-name="Preformatted_20_Text">Modell <text:s text:c="14"/>Aufgabe <text:s text:c="6"/>F1 Separat <text:s/>F1 Kombiniert <text:s text:c="4"/>Δ F1</text:p>
      <text:p text:style-name="Preformatted_20_Text">----------------------------------------------------------------------</text:p>
      <text:p text:style-name="Preformatted_20_Text">gpt-4o-mini <text:s text:c="9"/>task_type <text:s text:c="8"/>0.4397 <text:s text:c="8"/>0.4025 ▼ 0.0372</text:p>
      <text:p text:style-name="Preformatted_20_Text">gpt-4o-mini <text:s text:c="9"/>sentiment <text:s text:c="8"/>0.3125 <text:s text:c="8"/>0.6882 ▲ 0.3757</text:p>
      <text:p text:style-name="Preformatted_20_Text">gpt-4o-mini <text:s text:c="9"/>critical <text:s text:c="9"/>0.4118 <text:s text:c="8"/>0.4697 ▲ 0.0579</text:p>
      <text:p text:style-name="Preformatted_20_Text">gpt-4.1 <text:s text:c="13"/>task_type <text:s text:c="8"/>0.4086 <text:s text:c="8"/>0.3155 ▼ 0.0931</text:p>
      <text:p text:style-name="Preformatted_20_Text">gpt-4.1 <text:s text:c="13"/>sentiment <text:s text:c="8"/>0.4087 <text:s text:c="8"/>0.5253 ▲ 0.1166</text:p>
      <text:p text:style-name="Preformatted_20_Text">gpt-4.1 <text:s text:c="13"/>critical <text:s text:c="9"/>0.4400 <text:s text:c="8"/>0.5536 ▲ 0.1136</text:p>
      <text:p text:style-name="Preformatted_20_Text">gpt-5.4-mini <text:s text:c="8"/>task_type <text:s text:c="8"/>0.4567 <text:s text:c="8"/>0.5557 ▲ 0.0990</text:p>
      <text:p text:style-name="Preformatted_20_Text">gpt-5.4-mini <text:s text:c="8"/>sentiment <text:s text:c="8"/>0.5302 <text:s text:c="8"/>0.4339 ▼ 0.0963</text:p>
      <text:p text:style-name="P1">gpt-5.4-mini <text:s text:c="8"/>critical <text:s text:c="9"/>0.5200 <text:s text:c="8"/>0.3617 ▼ 0.1583</text:p>
      <text:p text:style-name="Standard"/>
      <text:p text:style-name="P4"/>
      <text:p text:style-name="Standard"># Separate Prompts</text:p>
      <text:p text:style-name="Standard">prompt_task = ChatPromptTemplate.from_messages([</text:p>
      <text:p text:style-name="Standard"><text:s text:c="4"/>("system", """Du bist ein Klassifikationssystem. Analysiere das folgende Chat-Log und bestimme,</text:p>
      <text:p text:style-name="Standard">welcher Aufgabentyp in diesem Chat vorhanden ist. Wenn mehrer Aufgabentypen vorkommen, wähle den dominanten.</text:p>
      <text:p text:style-name="Standard"/>
      <text:p text:style-name="Standard">Aufgabentyp:</text:p>
      <text:p text:style-name="Standard">(1) Informationssuche und Verständnis, z. B. um Literaturhinweise, Suchbegriffe oder Rechercheansätze zu erhalten, Theorien und Konzepte erklären zu lassen oder Verständnisfragen zu Studieninhalten zu klären.</text:p>
      <text:p text:style-name="Standard"/>
      <text:p text:style-name="Standard">(2) "Schreiben und Textarbeit", z. B. um Feedback zu eigenen Texten zu erhalten, Gliederungen zu erstellen, Texte zusammenfassen zu lassen, Textbausteine oder Formulierungsvorschläge zu erstellen oder Texte zu übersetzen bzw. sprachlich zu überarbeiten.</text:p>
      <text:p text:style-name="Standard"/>
      <text:p text:style-name="Standard">(3) "Praktische Unterstützung und Strukturierung", z. B. um Ideen für eine Hausarbeit, einen Essay oder eine Präsentation zu entwickeln, ein Projekt zu strukturieren, nächste Arbeitsschritte zu planen oder Unterstützung bei Problemlösung und Entscheidungsfindung zu erhalten.</text:p>
      <text:p text:style-name="Standard"/>
      <text:p text:style-name="Standard">(4) "Technische und analytische Unterstützung", z. B. um Code zu erstellen oder zu überarbeiten, Datenanalysen oder Datenvisualisierungen vorzubereiten oder Ergebnisse aus Statistik- und Analyseprogrammen wie R, Stata oder SPSS interpretieren zu lassen.</text:p>
      <text:p text:style-name="Standard"/>
      <text:p text:style-name="Standard">(5) "Lernen und Prüfungsvorbereitung", z. B. um sich auf Prüfungen vorzubereiten oder Lernfragen, Übungsaufgaben oder Karteikarten zu erstellen.</text:p>
      <text:p text:style-name="Standard"/>
      <text:p text:style-name="Standard">Antworte NUR mit EINEM der folgenden Labels (exakt so):</text:p>
      <text:p text:style-name="Standard">{labels}"""),</text:p>
      <text:p text:style-name="Standard"><text:s text:c="4"/>("human", "Chat-Log:\n{text}\n"),</text:p>
      <text:p text:style-name="Standard">]).partial(labels=" | ".join(LABELS_TASK))</text:p>
      <text:p text:style-name="Standard"/>
      <text:p text:style-name="Standard">prompt_sentiment = ChatPromptTemplate.from_messages([</text:p>
      <text:p text:style-name="Standard"><text:s text:c="4"/>("system", """Du bist ein Klassifikationssystem. Analysiere den Ton des folgenden Chat-Logs.</text:p>
      <text:p text:style-name="Standard"/>
      <text:p text:style-name="Standard">Bewerte den Ton als:</text:p>
      <text:p text:style-name="Standard">- Unfreundlich: abweisend, fordernd, ungeduldig</text:p>
      <text:p text:style-name="Standard">- Neutral: sachlich, nüchtern, aufgabenorientiert</text:p>
      <text:p text:style-name="Standard">- Freundlich: höflich, wertschätzend, kooperativ</text:p>
      <text:p text:style-name="Standard"/>
      <text:p text:style-name="Standard">Antworte NUR mit EINEM der folgenden Labels (exakt so):</text:p>
      <text:p text:style-name="Standard">{labels}"""),</text:p>
      <text:p text:style-name="Standard"><text:s text:c="4"/>("human", "Chat-Log:\n{text}\n"),</text:p>
      <text:p text:style-name="Standard">]).partial(labels=" | ".join(LABELS_SENTIMENT))</text:p>
      <text:p text:style-name="Standard"/>
      <text:p text:style-name="Standard">prompt_critical = ChatPromptTemplate.from_messages([</text:p>
      <text:p text:style-name="Standard"><text:s text:c="4"/>("system", """Du bist ein Klassifikationssystem. Analysiere das folgende Chat-Log.</text:p>
      <text:p text:style-name="Standard"/>
      <text:p text:style-name="Standard">Fragt die Person ChatGPT nach Hinweisen zur Überprüfung der Antwort,</text:p>
      <text:p text:style-name="Standard">z z. B. Quellen, Belege, Gegenargumente oder eine Prüfung auf mögliche Fehler.</text:p>
      <text:p text:style-name="Standard"/>
      <text:p text:style-name="Standard"><text:soft-page-break/></text:p>
      <text:p text:style-name="Standard">Antworte NUR mit EINEM der folgenden Labels (exakt so):</text:p>
      <text:p text:style-name="Standard">{labels}"""),</text:p>
      <text:p text:style-name="Standard"><text:s text:c="4"/>("human", "Chat-Log:\n{text}\n"),</text:p>
      <text:p text:style-name="Standard">]).partial(labels=" | ".join(LABELS_CRITICAL))</text:p>
      <text:p text:style-name="Standard"/>
      <text:p text:style-name="Standard"># Kombinierter Prompt</text:p>
      <text:p text:style-name="Standard">prompt_combined = ChatPromptTemplate.from_messages([</text:p>
      <text:p text:style-name="Standard"><text:s text:c="4"/>("system", """Du bist ein Klassifikationssystem für akademische Chat-Logs.</text:p>
      <text:p text:style-name="Standard">Analysiere das folgende Chat-Log und klassifiziere es nach drei Kriterien.</text:p>
      <text:p text:style-name="Standard"/>
      <text:p text:style-name="Standard">KRITERIUM 1 – Aufgabentyp:</text:p>
      <text:p text:style-name="Standard">(1) Informationssuche und Verständnis, z. B. um Literaturhinweise, Suchbegriffe oder Rechercheansätze zu erhalten, Theorien und Konzepte erklären zu lassen oder Verständnisfragen zu Studieninhalten zu klären.</text:p>
      <text:p text:style-name="Standard"/>
      <text:p text:style-name="Standard">(2) Schreiben und Textarbeit, z. B. um Feedback zu eigenen Texten zu erhalten, Gliederungen zu erstellen, Texte zusammenfassen zu lassen, Textbausteine oder Formulierungsvorschläge zu erstellen oder Texte zu übersetzen bzw. sprachlich zu überarbeiten.</text:p>
      <text:p text:style-name="Standard"/>
      <text:p text:style-name="Standard">(3) Praktische Unterstützung und Strukturierung, z. B. um Ideen für eine Hausarbeit, einen Essay oder eine Präsentation zu entwickeln, ein Projekt zu strukturieren, nächste Arbeitsschritte zu planen oder Unterstützung bei Problemlösung und Entscheidungsfindung zu erhalten.</text:p>
      <text:p text:style-name="Standard"/>
      <text:p text:style-name="Standard">(4) Technische und analytische Unterstützung, z. B. um Code zu erstellen oder zu überarbeiten, Datenanalysen oder Datenvisualisierungen vorzubereiten oder Ergebnisse aus Statistik- und Analyseprogrammen wie R, Stata oder SPSS interpretieren zu lassen.</text:p>
      <text:p text:style-name="Standard"/>
      <text:p text:style-name="Standard">(5) Lernen und Prüfungsvorbereitung, z. B. um sich auf Prüfungen vorzubereiten oder Lernfragen, Übungsaufgaben oder Karteikarten zu erstellen.</text:p>
      <text:p text:style-name="Standard"/>
      <text:p text:style-name="Standard">KRITERIUM 2 – Ton/Sentiment:</text:p>
      <text:p text:style-name="Standard">Bewerte den Ton als:</text:p>
      <text:p text:style-name="Standard">- Unfreundlich: abweisend, fordernd, ungeduldig</text:p>
      <text:p text:style-name="Standard">- Neutral: sachlich, nüchtern, aufgabenorientiert</text:p>
      <text:p text:style-name="Standard">- Freundlich: höflich, wertschätzend, kooperativ</text:p>
      <text:p text:style-name="Standard"/>
      <text:p text:style-name="Standard">KRITERIUM 3 – Kritische Überprüfung:</text:p>
      <text:p text:style-name="Standard">Fragt die Person ChatGPT nach Hinweisen zur Überprüfung der Antwort,</text:p>
      <text:p text:style-name="Standard">z. B. Quellen, Belege, Gegenargumente oder eine Prüfung auf mögliche Fehler.</text:p>
      <text:p text:style-name="Standard"/>
      <text:p text:style-name="Standard">- Ja</text:p>
      <text:p text:style-name="Standard">- Nein</text:p>
      <text:p text:style-name="Standard"/>
      <text:p text:style-name="Standard">Antworte NUR in diesem exakten Format (drei Zeilen, nichts anderes):</text:p>
      <text:p text:style-name="Standard">TASK: &lt;Label&gt;</text:p>
      <text:p text:style-name="Standard">SENTIMENT: &lt;Label&gt;</text:p>
      <text:p text:style-name="Standard">CRITICAL: &lt;Label&gt;"""),</text:p>
      <text:p text:style-name="Standard"><text:s text:c="4"/>("human", "Chat-Log:\n{text}"),</text:p>
      <text:p text:style-name="Standard">])</text:p>
      <text:p text:style-name="P5">Run 1</text:p>
      <text:p text:style-name="P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ext:soft-page-break/>
        <table:table-row table:style-name="Table2.1">
          <table:table-cell table:style-name="Table2.A1" office:value-type="string">
            <text:p text:style-name="P7">Modell</text:p>
          </table:table-cell>
          <table:table-cell table:style-name="Table2.A1" office:value-type="string">
            <text:p text:style-name="P7">Strategie</text:p>
          </table:table-cell>
          <table:table-cell table:style-name="Table2.A1" office:value-type="string">
            <text:p text:style-name="P7">Aufgabe</text:p>
          </table:table-cell>
          <table:table-cell table:style-name="Table2.A1" office:value-type="string">
            <text:p text:style-name="P7">Accuracy</text:p>
          </table:table-cell>
          <table:table-cell table:style-name="Table2.A1" office:value-type="string">
            <text:p text:style-name="P7">Precision</text:p>
          </table:table-cell>
          <table:table-cell table:style-name="Table2.A1" office:value-type="string">
            <text:p text:style-name="P7">Recall</text:p>
          </table:table-cell>
          <table:table-cell table:style-name="Table2.A1" office:value-type="string">
            <text:p text:style-name="P7">F1 (macro)</text:p>
          </table:table-cell>
          <table:table-cell table:style-name="Table2.A1" office:value-type="string">
            <text:p text:style-name="P7">Unknown-Rate</text:p>
          </table:table-cell>
          <table:table-cell table:style-name="Table2.A1" office:value-type="string">
            <text:p text:style-name="P7">Latenz (s)</text:p>
          </table:table-cell>
        </table:table-row>
        <table:table-row table:style-name="Table2.1">
          <table:table-cell table:style-name="Table2.A1" office:value-type="string">
            <text:p text:style-name="P7">gpt-4o-mini</text:p>
          </table:table-cell>
          <table:table-cell table:style-name="Table2.A1" office:value-type="string">
            <text:p text:style-name="P8">combined</text:p>
          </table:table-cell>
          <table:table-cell table:style-name="Table2.A1" office:value-type="string">
            <text:p text:style-name="P8">critical</text:p>
          </table:table-cell>
          <table:table-cell table:style-name="Table2.A1" office:value-type="string">
            <text:p text:style-name="P8">0.76</text:p>
          </table:table-cell>
          <table:table-cell table:style-name="Table2.A1" office:value-type="string">
            <text:p text:style-name="P8">0.4318</text:p>
          </table:table-cell>
          <table:table-cell table:style-name="Table2.A1" office:value-type="string">
            <text:p text:style-name="P8">0.4318</text:p>
          </table:table-cell>
          <table:table-cell table:style-name="Table2.A1" office:value-type="string">
            <text:p text:style-name="P8">0.4318</text:p>
          </table:table-cell>
          <table:table-cell table:style-name="Table2.A1" office:value-type="string">
            <text:p text:style-name="P8">0.1667</text:p>
          </table:table-cell>
          <table:table-cell table:style-name="Table2.A1" office:value-type="string">
            <text:p text:style-name="P9">1194</text:p>
          </table:table-cell>
        </table:table-row>
        <table:table-row table:style-name="Table2.1">
          <table:table-cell table:style-name="Table2.A1" office:value-type="string">
            <text:p text:style-name="P7">gpt-4o-mini</text:p>
          </table:table-cell>
          <table:table-cell table:style-name="Table2.A1" office:value-type="string">
            <text:p text:style-name="P8">separate</text:p>
          </table:table-cell>
          <table:table-cell table:style-name="Table2.A1" office:value-type="string">
            <text:p text:style-name="P8">critical</text:p>
          </table:table-cell>
          <table:table-cell table:style-name="Table2.A1" office:value-type="string">
            <text:p text:style-name="P8">0.7667</text:p>
          </table:table-cell>
          <table:table-cell table:style-name="Table2.A1" office:value-type="string">
            <text:p text:style-name="P8">0.3966</text:p>
          </table:table-cell>
          <table:table-cell table:style-name="Table2.A1" office:value-type="string">
            <text:p text:style-name="P8">0.4792</text:p>
          </table:table-cell>
          <table:table-cell table:style-name="Table2.A1" office:value-type="string">
            <text:p text:style-name="P9">434</text:p>
          </table:table-cell>
          <table:table-cell table:style-name="Table2.A1" office:value-type="string">
            <text:p text:style-name="P8">0.0</text:p>
          </table:table-cell>
          <table:table-cell table:style-name="Table2.A1" office:value-type="string">
            <text:p text:style-name="P9">689</text:p>
          </table:table-cell>
        </table:table-row>
        <table:table-row table:style-name="Table2.1">
          <table:table-cell table:style-name="Table2.A1" office:value-type="string">
            <text:p text:style-name="P7">gpt-4o-mini</text:p>
          </table:table-cell>
          <table:table-cell table:style-name="Table2.A1" office:value-type="string">
            <text:p text:style-name="P8">combined</text:p>
          </table:table-cell>
          <table:table-cell table:style-name="Table2.A1" office:value-type="string">
            <text:p text:style-name="P8">sentiment</text:p>
          </table:table-cell>
          <table:table-cell table:style-name="Table2.A1" office:value-type="string">
            <text:p text:style-name="P8">0.8</text:p>
          </table:table-cell>
          <table:table-cell table:style-name="Table2.A1" office:value-type="string">
            <text:p text:style-name="P8">0.4405</text:p>
          </table:table-cell>
          <table:table-cell table:style-name="Table2.A1" office:value-type="string">
            <text:p text:style-name="P8">0.4028</text:p>
          </table:table-cell>
          <table:table-cell table:style-name="Table2.A1" office:value-type="string">
            <text:p text:style-name="P9">406</text:p>
          </table:table-cell>
          <table:table-cell table:style-name="Table2.A1" office:value-type="string">
            <text:p text:style-name="P8">0.0</text:p>
          </table:table-cell>
          <table:table-cell table:style-name="Table2.A1" office:value-type="string">
            <text:p text:style-name="P9">1194</text:p>
          </table:table-cell>
        </table:table-row>
        <table:table-row table:style-name="Table2.1">
          <table:table-cell table:style-name="Table2.A1" office:value-type="string">
            <text:p text:style-name="P7">gpt-4o-mini</text:p>
          </table:table-cell>
          <table:table-cell table:style-name="Table2.A1" office:value-type="string">
            <text:p text:style-name="P8">separate</text:p>
          </table:table-cell>
          <table:table-cell table:style-name="Table2.A1" office:value-type="string">
            <text:p text:style-name="P8">sentiment</text:p>
          </table:table-cell>
          <table:table-cell table:style-name="Table2.A1" office:value-type="string">
            <text:p text:style-name="P8">0.6</text:p>
          </table:table-cell>
          <table:table-cell table:style-name="Table2.A1" office:value-type="string">
            <text:p text:style-name="P8">0.3069</text:p>
          </table:table-cell>
          <table:table-cell table:style-name="Table2.A1" office:value-type="string">
            <text:p text:style-name="P8">0.4028</text:p>
          </table:table-cell>
          <table:table-cell table:style-name="Table2.A1" office:value-type="string">
            <text:p text:style-name="P8">0.3125</text:p>
          </table:table-cell>
          <table:table-cell table:style-name="Table2.A1" office:value-type="string">
            <text:p text:style-name="P8">0.0</text:p>
          </table:table-cell>
          <table:table-cell table:style-name="Table2.A1" office:value-type="string">
            <text:p text:style-name="P9">627</text:p>
          </table:table-cell>
        </table:table-row>
        <table:table-row table:style-name="Table2.1">
          <table:table-cell table:style-name="Table2.A1" office:value-type="string">
            <text:p text:style-name="P7">gpt-4o-mini</text:p>
          </table:table-cell>
          <table:table-cell table:style-name="Table2.A1" office:value-type="string">
            <text:p text:style-name="P8">combined</text:p>
          </table:table-cell>
          <table:table-cell table:style-name="Table2.A1" office:value-type="string">
            <text:p text:style-name="P8">task_type</text:p>
          </table:table-cell>
          <table:table-cell table:style-name="Table2.A1" office:value-type="string">
            <text:p text:style-name="P8">0.7586</text:p>
          </table:table-cell>
          <table:table-cell table:style-name="Table2.A1" office:value-type="string">
            <text:p text:style-name="P8">0.4361</text:p>
          </table:table-cell>
          <table:table-cell table:style-name="Table2.A1" office:value-type="string">
            <text:p text:style-name="P8">0.4367</text:p>
          </table:table-cell>
          <table:table-cell table:style-name="Table2.A1" office:value-type="string">
            <text:p text:style-name="P9">435</text:p>
          </table:table-cell>
          <table:table-cell table:style-name="Table2.A1" office:value-type="string">
            <text:p text:style-name="P8">0.0333</text:p>
          </table:table-cell>
          <table:table-cell table:style-name="Table2.A1" office:value-type="string">
            <text:p text:style-name="P9">1194</text:p>
          </table:table-cell>
        </table:table-row>
        <table:table-row table:style-name="Table2.1">
          <table:table-cell table:style-name="Table2.A1" office:value-type="string">
            <text:p text:style-name="P7">gpt-4o-mini</text:p>
          </table:table-cell>
          <table:table-cell table:style-name="Table2.A1" office:value-type="string">
            <text:p text:style-name="P8">separate</text:p>
          </table:table-cell>
          <table:table-cell table:style-name="Table2.A1" office:value-type="string">
            <text:p text:style-name="P8">task_type</text:p>
          </table:table-cell>
          <table:table-cell table:style-name="Table2.A1" office:value-type="string">
            <text:p text:style-name="P8">0.7667</text:p>
          </table:table-cell>
          <table:table-cell table:style-name="Table2.A1" office:value-type="string">
            <text:p text:style-name="P8">0.45</text:p>
          </table:table-cell>
          <table:table-cell table:style-name="Table2.A1" office:value-type="string">
            <text:p text:style-name="P8">0.4422</text:p>
          </table:table-cell>
          <table:table-cell table:style-name="Table2.A1" office:value-type="string">
            <text:p text:style-name="P8">0.4454</text:p>
          </table:table-cell>
          <table:table-cell table:style-name="Table2.A1" office:value-type="string">
            <text:p text:style-name="P8">0.0</text:p>
          </table:table-cell>
          <table:table-cell table:style-name="Table2.A1" office:value-type="string">
            <text:p text:style-name="P9">874</text:p>
          </table:table-cell>
        </table:table-row>
        <table:table-row table:style-name="Table2.1">
          <table:table-cell table:style-name="Table2.A1" office:value-type="string">
            <text:p text:style-name="P7">gpt-5.4-mini</text:p>
          </table:table-cell>
          <table:table-cell table:style-name="Table2.A1" office:value-type="string">
            <text:p text:style-name="P8">combined</text:p>
          </table:table-cell>
          <table:table-cell table:style-name="Table2.A1" office:value-type="string">
            <text:p text:style-name="P8">critical</text:p>
          </table:table-cell>
          <table:table-cell table:style-name="Table2.A1" office:value-type="string">
            <text:p text:style-name="P8">0.6333</text:p>
          </table:table-cell>
          <table:table-cell table:style-name="Table2.A1" office:value-type="string">
            <text:p text:style-name="P8">0.4627</text:p>
          </table:table-cell>
          <table:table-cell table:style-name="Table2.A1" office:value-type="string">
            <text:p text:style-name="P8">0.4583</text:p>
          </table:table-cell>
          <table:table-cell table:style-name="Table2.A1" office:value-type="string">
            <text:p text:style-name="P8">0.4599</text:p>
          </table:table-cell>
          <table:table-cell table:style-name="Table2.A1" office:value-type="string">
            <text:p text:style-name="P8">0.0</text:p>
          </table:table-cell>
          <table:table-cell table:style-name="Table2.A1" office:value-type="string">
            <text:p text:style-name="P9">1027</text:p>
          </table:table-cell>
        </table:table-row>
        <table:table-row table:style-name="Table2.1">
          <table:table-cell table:style-name="Table2.A1" office:value-type="string">
            <text:p text:style-name="P7">gpt-5.4-mini</text:p>
          </table:table-cell>
          <table:table-cell table:style-name="Table2.A1" office:value-type="string">
            <text:p text:style-name="P8">separate</text:p>
          </table:table-cell>
          <table:table-cell table:style-name="Table2.A1" office:value-type="string">
            <text:p text:style-name="P8">critical</text:p>
          </table:table-cell>
          <table:table-cell table:style-name="Table2.A1" office:value-type="string">
            <text:p text:style-name="P8">0.6333</text:p>
          </table:table-cell>
          <table:table-cell table:style-name="Table2.A1" office:value-type="string">
            <text:p text:style-name="P8">0.4627</text:p>
          </table:table-cell>
          <table:table-cell table:style-name="Table2.A1" office:value-type="string">
            <text:p text:style-name="P8">0.4583</text:p>
          </table:table-cell>
          <table:table-cell table:style-name="Table2.A1" office:value-type="string">
            <text:p text:style-name="P8">0.4599</text:p>
          </table:table-cell>
          <table:table-cell table:style-name="Table2.A1" office:value-type="string">
            <text:p text:style-name="P8">0.0</text:p>
          </table:table-cell>
          <table:table-cell table:style-name="Table2.A1" office:value-type="string">
            <text:p text:style-name="P8">0.86</text:p>
          </table:table-cell>
        </table:table-row>
        <table:table-row table:style-name="Table2.1">
          <table:table-cell table:style-name="Table2.A1" office:value-type="string">
            <text:p text:style-name="P7">gpt-5.4-mini</text:p>
          </table:table-cell>
          <table:table-cell table:style-name="Table2.A1" office:value-type="string">
            <text:p text:style-name="P8">combined</text:p>
          </table:table-cell>
          <table:table-cell table:style-name="Table2.A1" office:value-type="string">
            <text:p text:style-name="P8">sentiment</text:p>
          </table:table-cell>
          <table:table-cell table:style-name="Table2.A1" office:value-type="string">
            <text:p text:style-name="P8">0.7333</text:p>
          </table:table-cell>
          <table:table-cell table:style-name="Table2.A1" office:value-type="string">
            <text:p text:style-name="P9">437</text:p>
          </table:table-cell>
          <table:table-cell table:style-name="Table2.A1" office:value-type="string">
            <text:p text:style-name="P8">0.5833</text:p>
          </table:table-cell>
          <table:table-cell table:style-name="Table2.A1" office:value-type="string">
            <text:p text:style-name="P8">0.4568</text:p>
          </table:table-cell>
          <table:table-cell table:style-name="Table2.A1" office:value-type="string">
            <text:p text:style-name="P8">0.0</text:p>
          </table:table-cell>
          <table:table-cell table:style-name="Table2.A1" office:value-type="string">
            <text:p text:style-name="P9">1027</text:p>
          </table:table-cell>
        </table:table-row>
        <table:table-row table:style-name="Table2.1">
          <table:table-cell table:style-name="Table2.A1" office:value-type="string">
            <text:p text:style-name="P7">gpt-5.4-mini</text:p>
          </table:table-cell>
          <table:table-cell table:style-name="Table2.A1" office:value-type="string">
            <text:p text:style-name="P8">separate</text:p>
          </table:table-cell>
          <table:table-cell table:style-name="Table2.A1" office:value-type="string">
            <text:p text:style-name="P8">sentiment</text:p>
          </table:table-cell>
          <table:table-cell table:style-name="Table2.A1" office:value-type="string">
            <text:p text:style-name="P8">0.7241</text:p>
          </table:table-cell>
          <table:table-cell table:style-name="Table2.A1" office:value-type="string">
            <text:p text:style-name="P8">0.3889</text:p>
          </table:table-cell>
          <table:table-cell table:style-name="Table2.A1" office:value-type="string">
            <text:p text:style-name="P8">0.3732</text:p>
          </table:table-cell>
          <table:table-cell table:style-name="Table2.A1" office:value-type="string">
            <text:p text:style-name="P8">0.3789</text:p>
          </table:table-cell>
          <table:table-cell table:style-name="Table2.A1" office:value-type="string">
            <text:p text:style-name="P8">0.0333</text:p>
          </table:table-cell>
          <table:table-cell table:style-name="Table2.A1" office:value-type="string">
            <text:p text:style-name="P9">791</text:p>
          </table:table-cell>
        </table:table-row>
        <table:table-row table:style-name="Table2.1">
          <table:table-cell table:style-name="Table2.A1" office:value-type="string">
            <text:p text:style-name="P7">gpt-5.4-mini</text:p>
          </table:table-cell>
          <table:table-cell table:style-name="Table2.A1" office:value-type="string">
            <text:p text:style-name="P8">combined</text:p>
          </table:table-cell>
          <table:table-cell table:style-name="Table2.A1" office:value-type="string">
            <text:p text:style-name="P8">task_type</text:p>
          </table:table-cell>
          <table:table-cell table:style-name="Table2.A1" office:value-type="string">
            <text:p text:style-name="P8">0.5333</text:p>
          </table:table-cell>
          <table:table-cell table:style-name="Table2.A1" office:value-type="string">
            <text:p text:style-name="P8">0.4</text:p>
          </table:table-cell>
          <table:table-cell table:style-name="Table2.A1" office:value-type="string">
            <text:p text:style-name="P9">331</text:p>
          </table:table-cell>
          <table:table-cell table:style-name="Table2.A1" office:value-type="string">
            <text:p text:style-name="P8">0.3548</text:p>
          </table:table-cell>
          <table:table-cell table:style-name="Table2.A1" office:value-type="string">
            <text:p text:style-name="P8">0.5</text:p>
          </table:table-cell>
          <table:table-cell table:style-name="Table2.A1" office:value-type="string">
            <text:p text:style-name="P9">1027</text:p>
          </table:table-cell>
        </table:table-row>
        <table:table-row table:style-name="Table2.1">
          <table:table-cell table:style-name="Table2.A1" office:value-type="string">
            <text:p text:style-name="P7">gpt-5.4-mini</text:p>
          </table:table-cell>
          <table:table-cell table:style-name="Table2.A1" office:value-type="string">
            <text:p text:style-name="P8">separate</text:p>
          </table:table-cell>
          <table:table-cell table:style-name="Table2.A1" office:value-type="string">
            <text:p text:style-name="P8">task_type</text:p>
          </table:table-cell>
          <table:table-cell table:style-name="Table2.A1" office:value-type="string">
            <text:p text:style-name="P8">0.8</text:p>
          </table:table-cell>
          <table:table-cell table:style-name="Table2.A1" office:value-type="string">
            <text:p text:style-name="P9">475</text:p>
          </table:table-cell>
          <table:table-cell table:style-name="Table2.A1" office:value-type="string">
            <text:p text:style-name="P8">0.5289</text:p>
          </table:table-cell>
          <table:table-cell table:style-name="Table2.A1" office:value-type="string">
            <text:p text:style-name="P8">0.4895</text:p>
          </table:table-cell>
          <table:table-cell table:style-name="Table2.A1" office:value-type="string">
            <text:p text:style-name="P8">0.0</text:p>
          </table:table-cell>
          <table:table-cell table:style-name="Table2.A1" office:value-type="string">
            <text:p text:style-name="P9">784</text:p>
          </table:table-cell>
        </table:table-row>
        <table:table-row table:style-name="Table2.1">
          <table:table-cell table:style-name="Table2.A1" office:value-type="string">
            <text:p text:style-name="P7">gpt-5.5</text:p>
          </table:table-cell>
          <table:table-cell table:style-name="Table2.A1" office:value-type="string">
            <text:p text:style-name="P8">combined</text:p>
          </table:table-cell>
          <table:table-cell table:style-name="Table2.A1" office:value-type="string">
            <text:p text:style-name="P8">critical</text:p>
          </table:table-cell>
          <table:table-cell table:style-name="Table2.A1" office:value-type="string">
            <text:p text:style-name="P8">0.6333</text:p>
          </table:table-cell>
          <table:table-cell table:style-name="Table2.A1" office:value-type="string">
            <text:p text:style-name="P8">0.5574</text:p>
          </table:table-cell>
          <table:table-cell table:style-name="Table2.A1" office:value-type="string">
            <text:p text:style-name="P8">0.5833</text:p>
          </table:table-cell>
          <table:table-cell table:style-name="Table2.A1" office:value-type="string">
            <text:p text:style-name="P8">0.5486</text:p>
          </table:table-cell>
          <table:table-cell table:style-name="Table2.A1" office:value-type="string">
            <text:p text:style-name="P8">0.0</text:p>
          </table:table-cell>
          <table:table-cell table:style-name="Table2.A1" office:value-type="string">
            <text:p text:style-name="P9">4676</text:p>
          </table:table-cell>
        </table:table-row>
        <table:table-row table:style-name="Table2.1">
          <table:table-cell table:style-name="Table2.A1" office:value-type="string">
            <text:p text:style-name="P7">gpt-5.5</text:p>
          </table:table-cell>
          <table:table-cell table:style-name="Table2.A1" office:value-type="string">
            <text:p text:style-name="P8">separate</text:p>
          </table:table-cell>
          <table:table-cell table:style-name="Table2.A1" office:value-type="string">
            <text:p text:style-name="P8">critical</text:p>
          </table:table-cell>
          <table:table-cell table:style-name="Table2.A1" office:value-type="string">
            <text:p text:style-name="P8">0.6333</text:p>
          </table:table-cell>
          <table:table-cell table:style-name="Table2.A1" office:value-type="string">
            <text:p text:style-name="P8">0.38</text:p>
          </table:table-cell>
          <table:table-cell table:style-name="Table2.A1" office:value-type="string">
            <text:p text:style-name="P8">0.3958</text:p>
          </table:table-cell>
          <table:table-cell table:style-name="Table2.A1" office:value-type="string">
            <text:p text:style-name="P8">0.3878</text:p>
          </table:table-cell>
          <table:table-cell table:style-name="Table2.A1" office:value-type="string">
            <text:p text:style-name="P8">0.0</text:p>
          </table:table-cell>
          <table:table-cell table:style-name="Table2.A1" office:value-type="string">
            <text:p text:style-name="P9">2724</text:p>
          </table:table-cell>
        </table:table-row>
        <table:table-row table:style-name="Table2.1">
          <table:table-cell table:style-name="Table2.A1" office:value-type="string">
            <text:p text:style-name="P7">gpt-5.5</text:p>
          </table:table-cell>
          <table:table-cell table:style-name="Table2.A1" office:value-type="string">
            <text:p text:style-name="P8">combined</text:p>
          </table:table-cell>
          <table:table-cell table:style-name="Table2.A1" office:value-type="string">
            <text:p text:style-name="P8">sentiment</text:p>
          </table:table-cell>
          <table:table-cell table:style-name="Table2.A1" office:value-type="string">
            <text:p text:style-name="P8">0.8667</text:p>
          </table:table-cell>
          <table:table-cell table:style-name="Table2.A1" office:value-type="string">
            <text:p text:style-name="P8">0.8504</text:p>
          </table:table-cell>
          <table:table-cell table:style-name="Table2.A1" office:value-type="string">
            <text:p text:style-name="P8">0.6528</text:p>
          </table:table-cell>
          <table:table-cell table:style-name="Table2.A1" office:value-type="string">
            <text:p text:style-name="P8">0.7194</text:p>
          </table:table-cell>
          <table:table-cell table:style-name="Table2.A1" office:value-type="string">
            <text:p text:style-name="P8">0.0</text:p>
          </table:table-cell>
          <table:table-cell table:style-name="Table2.A1" office:value-type="string">
            <text:p text:style-name="P9">4676</text:p>
          </table:table-cell>
        </table:table-row>
        <table:table-row table:style-name="Table2.1">
          <table:table-cell table:style-name="Table2.A1" office:value-type="string">
            <text:p text:style-name="P7">gpt-5.5</text:p>
          </table:table-cell>
          <table:table-cell table:style-name="Table2.A1" office:value-type="string">
            <text:p text:style-name="P8">separate</text:p>
          </table:table-cell>
          <table:table-cell table:style-name="Table2.A1" office:value-type="string">
            <text:p text:style-name="P8">sentiment</text:p>
          </table:table-cell>
          <table:table-cell table:style-name="Table2.A1" office:value-type="string">
            <text:p text:style-name="P8">0.8333</text:p>
          </table:table-cell>
          <table:table-cell table:style-name="Table2.A1" office:value-type="string">
            <text:p text:style-name="P9">784</text:p>
          </table:table-cell>
          <table:table-cell table:style-name="Table2.A1" office:value-type="string">
            <text:p text:style-name="P8">0.5694</text:p>
          </table:table-cell>
          <table:table-cell table:style-name="Table2.A1" office:value-type="string">
            <text:p text:style-name="P9">634</text:p>
          </table:table-cell>
          <table:table-cell table:style-name="Table2.A1" office:value-type="string">
            <text:p text:style-name="P8">0.0</text:p>
          </table:table-cell>
          <table:table-cell table:style-name="Table2.A1" office:value-type="string">
            <text:p text:style-name="P9">2252</text:p>
          </table:table-cell>
        </table:table-row>
        <table:table-row table:style-name="Table2.1">
          <table:table-cell table:style-name="Table2.A1" office:value-type="string">
            <text:p text:style-name="P7">gpt-5.5</text:p>
          </table:table-cell>
          <table:table-cell table:style-name="Table2.A1" office:value-type="string">
            <text:p text:style-name="P8">combined</text:p>
          </table:table-cell>
          <table:table-cell table:style-name="Table2.A1" office:value-type="string">
            <text:p text:style-name="P8">task_type</text:p>
          </table:table-cell>
          <table:table-cell table:style-name="Table2.A1" office:value-type="string">
            <text:p text:style-name="P8">0.8667</text:p>
          </table:table-cell>
          <table:table-cell table:style-name="Table2.A1" office:value-type="string">
            <text:p text:style-name="P8">0.7083</text:p>
          </table:table-cell>
          <table:table-cell table:style-name="Table2.A1" office:value-type="string">
            <text:p text:style-name="P8">0.6422</text:p>
          </table:table-cell>
          <table:table-cell table:style-name="Table2.A1" office:value-type="string">
            <text:p text:style-name="P9">649</text:p>
          </table:table-cell>
          <table:table-cell table:style-name="Table2.A1" office:value-type="string">
            <text:p text:style-name="P8">0.0</text:p>
          </table:table-cell>
          <table:table-cell table:style-name="Table2.A1" office:value-type="string">
            <text:p text:style-name="P9">4676</text:p>
          </table:table-cell>
        </table:table-row>
        <table:table-row table:style-name="Table2.1">
          <table:table-cell table:style-name="Table2.A1" office:value-type="string">
            <text:p text:style-name="P7">gpt-5.5</text:p>
          </table:table-cell>
          <table:table-cell table:style-name="Table2.A1" office:value-type="string">
            <text:p text:style-name="P8">separate</text:p>
          </table:table-cell>
          <table:table-cell table:style-name="Table2.A1" office:value-type="string">
            <text:p text:style-name="P8">task_type</text:p>
          </table:table-cell>
          <table:table-cell table:style-name="Table2.A1" office:value-type="string">
            <text:p text:style-name="P8">0.9</text:p>
          </table:table-cell>
          <table:table-cell table:style-name="Table2.A1" office:value-type="string">
            <text:p text:style-name="P8">0.7208</text:p>
          </table:table-cell>
          <table:table-cell table:style-name="Table2.A1" office:value-type="string">
            <text:p text:style-name="P8">0.6556</text:p>
          </table:table-cell>
          <table:table-cell table:style-name="Table2.A1" office:value-type="string">
            <text:p text:style-name="P8">0.6619</text:p>
          </table:table-cell>
          <table:table-cell table:style-name="Table2.A1" office:value-type="string">
            <text:p text:style-name="P8">0.0</text:p>
          </table:table-cell>
          <table:table-cell table:style-name="Table2.A1" office:value-type="string">
            <text:p text:style-name="P9">3279</text:p>
          </table:table-cell>
        </table:table-row>
      </table:table>
      <text:p text:style-name="Standard"/>
      <text:p text:style-name="P5"/>
      <text:p text:style-name="P6"/>
      <text:p text:style-name="P5"># Separate Prompts</text:p>
      <text:p text:style-name="P5">prompt_task = ChatPromptTemplate.from_messages([</text:p>
      <text:p text:style-name="P5"><text:s text:c="4"/>("system", """Du bist ein Klassifikationssystem. Analysiere das folgende Chat-Log und bestimme,</text:p>
      <text:p text:style-name="P5">welcher Aufgabentyp in diesem Chat vorhanden ist. Wenn mehrer Aufgabentypen vorkommen, wähle den dominanten.</text:p>
      <text:p text:style-name="P5"/>
      <text:p text:style-name="P5">Aufgabentyp:</text:p>
      <text:p text:style-name="P5">(1) Informationssuche und Verständnis, z. B. um Literaturhinweise, Suchbegriffe oder Rechercheansätze zu erhalten, Theorien und Konzepte erklären zu lassen oder Verständnisfragen zu Studieninhalten zu klären.</text:p>
      <text:p text:style-name="P5"/>
      <text:p text:style-name="P5">(2) "Schreiben und Textarbeit", z. B. um Feedback zu eigenen Texten zu erhalten, Gliederungen zu erstellen, Texte zusammenfassen zu lassen, Textbausteine oder Formulierungsvorschläge zu erstellen oder Texte zu übersetzen bzw. sprachlich zu überarbeiten.</text:p>
      <text:p text:style-name="P5"/>
      <text:p text:style-name="P5">(3) "Praktische Unterstützung und Strukturierung", z. B. um Ideen für eine Hausarbeit, einen Essay oder eine Präsentation zu entwickeln, ein Projekt zu strukturieren, nächste Arbeitsschritte zu planen oder Unterstützung bei Problemlösung und Entscheidungsfindung zu erhalten.</text:p>
      <text:p text:style-name="P5"/>
      <text:p text:style-name="P5">(4) "Technische und analytische Unterstützung", z. B. um Code zu erstellen oder zu überarbeiten, Datenanalysen oder Datenvisualisierungen vorzubereiten oder Ergebnisse aus Statistik- und Analyseprogrammen wie R, Stata oder SPSS interpretieren zu lassen.</text:p>
      <text:p text:style-name="P5"/>
      <text:p text:style-name="P5">(5) "Lernen und Prüfungsvorbereitung", z. B. um sich auf Prüfungen vorzubereiten oder Lernfragen, Übungsaufgaben oder Karteikarten zu erstellen.</text:p>
      <text:p text:style-name="P5"/>
      <text:p text:style-name="P5">Antworte NUR mit EINEM der folgenden Labels (exakt so):</text:p>
      <text:p text:style-name="P5">{labels}"""),</text:p>
      <text:p text:style-name="P5"><text:s text:c="4"/>("human", "Chat-Log:\n{text}\n"),</text:p>
      <text:p text:style-name="P5">]).partial(labels=" | ".join(LABELS_TASK))</text:p>
      <text:p text:style-name="P5"/>
      <text:p text:style-name="P5">prompt_sentiment = ChatPromptTemplate.from_messages([</text:p>
      <text:p text:style-name="P5"><text:s text:c="4"/>("system", """Du bist ein Klassifikationssystem für akademische Chat-Logs.</text:p>
      <text:p text:style-name="P5"/>
      <text:p text:style-name="P5">Analysiere den Kommunikationsstil der Person im folgenden Chat-Log.</text:p>
      <text:p text:style-name="P5">Beachte: Es handelt sich um Studierende die ChatGPT für akademische Aufgaben nutzen.</text:p>
      <text:p text:style-name="P5">Der Großteil der Chats ist neutral-sachlich — sei bei der Vergabe von "Freundlich"</text:p>
      <text:p text:style-name="P5">und "Unfreundlich" konservativ.</text:p>
      <text:p text:style-name="P5"/>
      <text:p text:style-name="P5">Vergib "Unfreundlich" wenn die Person:</text:p>
      <text:p text:style-name="P5">- Sehr kurze, befehlsartige Nachrichten schreibt</text:p>
      <text:p text:style-name="P5">- Ungeduld oder Frustration zeigt</text:p>
      <text:p text:style-name="P5">- fordernd oder abweisend wirkt</text:p>
      <text:p text:style-name="P5"/>
      <text:p text:style-name="P5">Vergib "Freundlich" <text:s/>wenn die Person:</text:p>
      <text:p text:style-name="P5">- Begrüßungen verwendet</text:p>
      <text:p text:style-name="P5">- Explizit "bitte" oder "danke" schreibt</text:p>
      <text:p text:style-name="P5">- Wertschätzung oder positive Rückmeldung ausdrückt</text:p>
      <text:p text:style-name="P5"/>
      <text:p text:style-name="P5">Vergib "Neutral" <text:s/>die Person:</text:p>
      <text:p text:style-name="P5"><text:soft-page-break/>- Sachlich und aufgabenorientiert schreibt</text:p>
      <text:p text:style-name="P5">- Technische Fragen oder Code ohne emotionalen Ton stellt</text:p>
      <text:p text:style-name="P5">- Direkt zur Sache kommt ohne besondere Freundlichkeit oder Unfreundlichkeit</text:p>
      <text:p text:style-name="P5">- Im Zweifel: Neutral ist der Standard für akademisch-technische Chats</text:p>
      <text:p text:style-name="P5"/>
      <text:p text:style-name="P5">Antworte NUR mit EINEM der folgenden Labels (exakt so):</text:p>
      <text:p text:style-name="P5">{labels}"""),</text:p>
      <text:p text:style-name="P5"><text:s text:c="4"/>("human", "Chat-Log:\n{text}"),</text:p>
      <text:p text:style-name="P5">]).partial(labels=" | ".join(LABELS_SENTIMENT))</text:p>
      <text:p text:style-name="P5"/>
      <text:p text:style-name="P5"/>
      <text:p text:style-name="P5">prompt_critical = ChatPromptTemplate.from_messages([</text:p>
      <text:p text:style-name="P5"><text:s text:c="4"/>("system", """Du bist ein Klassifikationssystem für akademische Chat-Logs.</text:p>
      <text:p text:style-name="P5"/>
      <text:p text:style-name="P5">Analysiere das folgende Chat-Log und bestimme, ob die Person die Antworten von ChatGPT</text:p>
      <text:p text:style-name="P5">aktiv überprüft oder hinterfragt.</text:p>
      <text:p text:style-name="P5"/>
      <text:p text:style-name="P5">Vergib "Ja" wenn die Person mindestens EINES der folgenden Verhaltensweisen zeigt:</text:p>
      <text:p text:style-name="P5">- Fragt explizit nach Quellen, Belegen oder Literatur zur Überprüfung</text:p>
      <text:p text:style-name="P5">- Meldet dass eine Antwort falsch oder unvollständig war und korrigiert</text:p>
      <text:p text:style-name="P5">- Hinterfragt ein Ergebnis kritisch</text:p>
      <text:p text:style-name="P5">- Bittet um Gegenargumente oder alternative Perspektiven</text:p>
      <text:p text:style-name="P5">- Exportiert den Chatverlauf zur eigenen Kontrolle</text:p>
      <text:p text:style-name="P5">- Wiederholt eine Anfrage weil das erste Ergebnis nicht gepasst hat</text:p>
      <text:p text:style-name="P5"/>
      <text:p text:style-name="P5">Vergib "Nein" wenn die Person:</text:p>
      <text:p text:style-name="P5">- Die Antworten von ChatGPT einfach übernimmt ohne zu hinterfragen</text:p>
      <text:p text:style-name="P5">- Nur neue unabhängige Fragen stellt ohne frühere Antworten zu prüfen</text:p>
      <text:p text:style-name="P5">- Ausschließlich neue Aufgaben delegiert</text:p>
      <text:p text:style-name="P5"/>
      <text:p text:style-name="P5">Antworte NUR mit EINEM der folgenden Labels (exakt so):</text:p>
      <text:p text:style-name="P5">{labels}"""),</text:p>
      <text:p text:style-name="P5"><text:s text:c="4"/>("human", "Chat-Log:\n{text}"),</text:p>
      <text:p text:style-name="P5">]).partial(labels=" | ".join(LABELS_CRITICAL))</text:p>
      <text:p text:style-name="P5"/>
      <text:p text:style-name="P5"># Kombinierter Prompt</text:p>
      <text:p text:style-name="P5">prompt_combined = ChatPromptTemplate.from_messages([</text:p>
      <text:p text:style-name="P5"><text:s text:c="4"/>("system", """Du bist ein Klassifikationssystem für akademische Chat-Logs.</text:p>
      <text:p text:style-name="P5">Analysiere das folgende Chat-Log und klassifiziere es nach drei Kriterien.</text:p>
      <text:p text:style-name="P5"/>
      <text:p text:style-name="P5">KRITERIUM 1 – Aufgabentyp:</text:p>
      <text:p text:style-name="P5">(1) Informationssuche und Verständnis, z. B. um Literaturhinweise, Suchbegriffe oder Rechercheansätze zu erhalten, Theorien und Konzepte erklären zu lassen oder Verständnisfragen zu Studieninhalten zu klären.</text:p>
      <text:p text:style-name="P5"/>
      <text:p text:style-name="P5">(2) Schreiben und Textarbeit, z. B. um Feedback zu eigenen Texten zu erhalten, Gliederungen zu erstellen, Texte zusammenfassen zu lassen, Textbausteine oder Formulierungsvorschläge zu erstellen oder Texte zu übersetzen bzw. sprachlich zu überarbeiten.</text:p>
      <text:p text:style-name="P5"/>
      <text:p text:style-name="P5">(3) Praktische Unterstützung und Strukturierung, z. B. um Ideen für eine Hausarbeit, einen Essay oder eine Präsentation zu entwickeln, ein Projekt zu strukturieren, nächste Arbeitsschritte zu planen oder Unterstützung bei Problemlösung und Entscheidungsfindung zu erhalten.</text:p>
      <text:p text:style-name="P5"><text:soft-page-break/></text:p>
      <text:p text:style-name="P5">(4) Technische und analytische Unterstützung, z. B. um Code zu erstellen oder zu überarbeiten, Datenanalysen oder Datenvisualisierungen vorzubereiten oder Ergebnisse aus Statistik- und Analyseprogrammen wie R, Stata oder SPSS interpretieren zu lassen.</text:p>
      <text:p text:style-name="P5"/>
      <text:p text:style-name="P5">(5) Lernen und Prüfungsvorbereitung, z. B. um sich auf Prüfungen vorzubereiten oder Lernfragen, Übungsaufgaben oder Karteikarten zu erstellen.</text:p>
      <text:p text:style-name="P5"/>
      <text:p text:style-name="P5">KRITERIUM 2 – Ton/Sentiment:</text:p>
      <text:p text:style-name="P5">Bewerte den Ton als:</text:p>
      <text:p text:style-name="P5"/>
      <text:p text:style-name="P5">"Unfreundlich" wenn die Person:</text:p>
      <text:p text:style-name="P5">- Sehr kurze, befehlsartige Nachrichten schreibt</text:p>
      <text:p text:style-name="P5">- Ungeduld oder Frustration zeigt</text:p>
      <text:p text:style-name="P5">- fordernd oder abweisend wirkt</text:p>
      <text:p text:style-name="P5"/>
      <text:p text:style-name="P5"><text:s/>"Freundlich" <text:s/>wenn die Person:</text:p>
      <text:p text:style-name="P5">- Begrüßungen verwendet</text:p>
      <text:p text:style-name="P5">- Explizit "bitte" oder "danke" schreibt</text:p>
      <text:p text:style-name="P5">- Wertschätzung oder positive Rückmeldung ausdrückt</text:p>
      <text:p text:style-name="P5"/>
      <text:p text:style-name="P5">"Neutral" <text:s/>die Person:</text:p>
      <text:p text:style-name="P5">- Sachlich und aufgabenorientiert schreibt</text:p>
      <text:p text:style-name="P5">- Technische Fragen oder Code ohne emotionalen Ton stellt</text:p>
      <text:p text:style-name="P5">- Direkt zur Sache kommt ohne besondere Freundlichkeit oder Unfreundlichkeit</text:p>
      <text:p text:style-name="P5">- Im Zweifel: Neutral ist der Standard für akademisch-technische Chats</text:p>
      <text:p text:style-name="P5"/>
      <text:p text:style-name="P5">KRITERIUM 3 – Kritische Überprüfung:</text:p>
      <text:p text:style-name="P5">Fragt die Person ChatGPT nach Hinweisen zur Überprüfung der Antwort?</text:p>
      <text:p text:style-name="P5"/>
      <text:p text:style-name="P5">Vergib "Ja" wenn die Person mindestens EINES der folgenden Verhaltensweisen zeigt:</text:p>
      <text:p text:style-name="P5">- Fragt explizit nach Quellen, Belegen oder Literatur zur Überprüfung</text:p>
      <text:p text:style-name="P5">- Meldet dass eine Antwort falsch oder unvollständig war und korrigiert</text:p>
      <text:p text:style-name="P5">- Hinterfragt ein Ergebnis kritisch</text:p>
      <text:p text:style-name="P5">- Bittet um Gegenargumente oder alternative Perspektiven</text:p>
      <text:p text:style-name="P5">- Exportiert den Chatverlauf zur eigenen Kontrolle</text:p>
      <text:p text:style-name="P5">- Wiederholt eine Anfrage weil das erste Ergebnis nicht gepasst hat</text:p>
      <text:p text:style-name="P5"/>
      <text:p text:style-name="P5">Vergib "Nein" wenn die Person:</text:p>
      <text:p text:style-name="P5">- Die Antworten von ChatGPT einfach übernimmt ohne zu hinterfragen</text:p>
      <text:p text:style-name="P5">- Nur neue unabhängige Fragen stellt ohne frühere Antworten zu prüfen</text:p>
      <text:p text:style-name="P5">- Ausschließlich neue Aufgaben delegiert</text:p>
      <text:p text:style-name="P5"/>
      <text:p text:style-name="P5">Antworte NUR in diesem exakten Format (drei Zeilen, nichts anderes):</text:p>
      <text:p text:style-name="P5">TASK: &lt;Label&gt;</text:p>
      <text:p text:style-name="P5">SENTIMENT: &lt;Label&gt;</text:p>
      <text:p text:style-name="P5">CRITICAL: &lt;Label&gt;"""),</text:p>
      <text:p text:style-name="P5"><text:s text:c="4"/>("human", "Chat-Log:\n{text}"),</text:p>
      <text:p text:style-name="P5">])</text:p>
      <text:p text:style-name="P5"/>
      <text:p text:style-name="P5"/>
      <text:p text:style-name="P5"/>
      <text:p text:style-name="P5"><text:soft-pag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8">Modell</text:p>
          </table:table-cell>
          <table:table-cell table:style-name="Table3.A1" office:value-type="string">
            <text:p text:style-name="P8">Strategie</text:p>
          </table:table-cell>
          <table:table-cell table:style-name="Table3.A1" office:value-type="string">
            <text:p text:style-name="P8">Aufgabe</text:p>
          </table:table-cell>
          <table:table-cell table:style-name="Table3.A1" office:value-type="string">
            <text:p text:style-name="P8">Accuracy</text:p>
          </table:table-cell>
          <table:table-cell table:style-name="Table3.A1" office:value-type="string">
            <text:p text:style-name="P8">Precision</text:p>
          </table:table-cell>
          <table:table-cell table:style-name="Table3.A1" office:value-type="string">
            <text:p text:style-name="P8">Recall</text:p>
          </table:table-cell>
          <table:table-cell table:style-name="Table3.A1" office:value-type="string">
            <text:p text:style-name="P8">F1 (macro)</text:p>
          </table:table-cell>
          <table:table-cell table:style-name="Table3.A1" office:value-type="string">
            <text:p text:style-name="P8">Unknown-Rate</text:p>
          </table:table-cell>
          <table:table-cell table:style-name="Table3.A1" office:value-type="string">
            <text:p text:style-name="P8">Latenz (s)</text:p>
          </table:table-cell>
        </table:table-row>
        <table:table-row table:style-name="Table3.1">
          <table:table-cell table:style-name="Table3.A1" office:value-type="string">
            <text:p text:style-name="P8">gpt-5.4-mini</text:p>
          </table:table-cell>
          <table:table-cell table:style-name="Table3.A1" office:value-type="string">
            <text:p text:style-name="P8">combined</text:p>
          </table:table-cell>
          <table:table-cell table:style-name="Table3.A1" office:value-type="string">
            <text:p text:style-name="P8">critical</text:p>
          </table:table-cell>
          <table:table-cell table:style-name="Table3.A1" office:value-type="string">
            <text:p text:style-name="P8">0.4333</text:p>
          </table:table-cell>
          <table:table-cell table:style-name="Table3.A1" office:value-type="string">
            <text:p text:style-name="P8">0.5635</text:p>
          </table:table-cell>
          <table:table-cell table:style-name="Table3.A1" office:value-type="string">
            <text:p text:style-name="P8">0.5833</text:p>
          </table:table-cell>
          <table:table-cell table:style-name="Table3.A1" office:value-type="string">
            <text:p text:style-name="P8">0.4276</text:p>
          </table:table-cell>
          <table:table-cell table:style-name="Table3.A1" office:value-type="string">
            <text:p text:style-name="P8">0.0</text:p>
          </table:table-cell>
          <table:table-cell table:style-name="Table3.A1" office:value-type="string">
            <text:p text:style-name="P9">1283</text:p>
          </table:table-cell>
        </table:table-row>
        <table:table-row table:style-name="Table3.1">
          <table:table-cell table:style-name="Table3.A1" office:value-type="string">
            <text:p text:style-name="P8">gpt-5.4-mini</text:p>
          </table:table-cell>
          <table:table-cell table:style-name="Table3.A1" office:value-type="string">
            <text:p text:style-name="P8">separate</text:p>
          </table:table-cell>
          <table:table-cell table:style-name="Table3.A1" office:value-type="string">
            <text:p text:style-name="P8">critical</text:p>
          </table:table-cell>
          <table:table-cell table:style-name="Table3.A1" office:value-type="string">
            <text:p text:style-name="P8">0.4667</text:p>
          </table:table-cell>
          <table:table-cell table:style-name="Table3.A1" office:value-type="string">
            <text:p text:style-name="P8">0.6364</text:p>
          </table:table-cell>
          <table:table-cell table:style-name="Table3.A1" office:value-type="string">
            <text:p text:style-name="P8">0.6667</text:p>
          </table:table-cell>
          <table:table-cell table:style-name="Table3.A1" office:value-type="string">
            <text:p text:style-name="P8">0.4643</text:p>
          </table:table-cell>
          <table:table-cell table:style-name="Table3.A1" office:value-type="string">
            <text:p text:style-name="P8">0.0</text:p>
          </table:table-cell>
          <table:table-cell table:style-name="Table3.A1" office:value-type="string">
            <text:p text:style-name="P9">831</text:p>
          </table:table-cell>
        </table:table-row>
        <table:table-row table:style-name="Table3.1">
          <table:table-cell table:style-name="Table3.A1" office:value-type="string">
            <text:p text:style-name="P8">gpt-5.4-mini</text:p>
          </table:table-cell>
          <table:table-cell table:style-name="Table3.A1" office:value-type="string">
            <text:p text:style-name="P8">combined</text:p>
          </table:table-cell>
          <table:table-cell table:style-name="Table3.A1" office:value-type="string">
            <text:p text:style-name="P8">sentiment</text:p>
          </table:table-cell>
          <table:table-cell table:style-name="Table3.A1" office:value-type="string">
            <text:p text:style-name="P8">0.8333</text:p>
          </table:table-cell>
          <table:table-cell table:style-name="Table3.A1" office:value-type="string">
            <text:p text:style-name="P8">0.5062</text:p>
          </table:table-cell>
          <table:table-cell table:style-name="Table3.A1" office:value-type="string">
            <text:p text:style-name="P8">0.4861</text:p>
          </table:table-cell>
          <table:table-cell table:style-name="Table3.A1" office:value-type="string">
            <text:p text:style-name="P8">0.4911</text:p>
          </table:table-cell>
          <table:table-cell table:style-name="Table3.A1" office:value-type="string">
            <text:p text:style-name="P8">0.0</text:p>
          </table:table-cell>
          <table:table-cell table:style-name="Table3.A1" office:value-type="string">
            <text:p text:style-name="P9">1283</text:p>
          </table:table-cell>
        </table:table-row>
        <table:table-row table:style-name="Table3.1">
          <table:table-cell table:style-name="Table3.A1" office:value-type="string">
            <text:p text:style-name="P8">gpt-5.4-mini</text:p>
          </table:table-cell>
          <table:table-cell table:style-name="Table3.A1" office:value-type="string">
            <text:p text:style-name="P8">separate</text:p>
          </table:table-cell>
          <table:table-cell table:style-name="Table3.A1" office:value-type="string">
            <text:p text:style-name="P8">sentiment</text:p>
          </table:table-cell>
          <table:table-cell table:style-name="Table3.A1" office:value-type="string">
            <text:p text:style-name="P8">0.8</text:p>
          </table:table-cell>
          <table:table-cell table:style-name="Table3.A1" office:value-type="string">
            <text:p text:style-name="P8">0.4506</text:p>
          </table:table-cell>
          <table:table-cell table:style-name="Table3.A1" office:value-type="string">
            <text:p text:style-name="P8">0.4028</text:p>
          </table:table-cell>
          <table:table-cell table:style-name="Table3.A1" office:value-type="string">
            <text:p text:style-name="P8">0.4118</text:p>
          </table:table-cell>
          <table:table-cell table:style-name="Table3.A1" office:value-type="string">
            <text:p text:style-name="P8">0.0</text:p>
          </table:table-cell>
          <table:table-cell table:style-name="Table3.A1" office:value-type="string">
            <text:p text:style-name="P8">0.98</text:p>
          </table:table-cell>
        </table:table-row>
        <table:table-row table:style-name="Table3.1">
          <table:table-cell table:style-name="Table3.A1" office:value-type="string">
            <text:p text:style-name="P8">gpt-5.4-mini</text:p>
          </table:table-cell>
          <table:table-cell table:style-name="Table3.A1" office:value-type="string">
            <text:p text:style-name="P8">combined</text:p>
          </table:table-cell>
          <table:table-cell table:style-name="Table3.A1" office:value-type="string">
            <text:p text:style-name="P8">task_type</text:p>
          </table:table-cell>
          <table:table-cell table:style-name="Table3.A1" office:value-type="string">
            <text:p text:style-name="P8">0.7895</text:p>
          </table:table-cell>
          <table:table-cell table:style-name="Table3.A1" office:value-type="string">
            <text:p text:style-name="P8">0.44</text:p>
          </table:table-cell>
          <table:table-cell table:style-name="Table3.A1" office:value-type="string">
            <text:p text:style-name="P8">0.54</text:p>
          </table:table-cell>
          <table:table-cell table:style-name="Table3.A1" office:value-type="string">
            <text:p text:style-name="P8">0.4733</text:p>
          </table:table-cell>
          <table:table-cell table:style-name="Table3.A1" office:value-type="string">
            <text:p text:style-name="P8">0.3667</text:p>
          </table:table-cell>
          <table:table-cell table:style-name="Table3.A1" office:value-type="string">
            <text:p text:style-name="P9">1283</text:p>
          </table:table-cell>
        </table:table-row>
        <table:table-row table:style-name="Table3.1">
          <table:table-cell table:style-name="Table3.A1" office:value-type="string">
            <text:p text:style-name="P8">gpt-5.4-mini</text:p>
          </table:table-cell>
          <table:table-cell table:style-name="Table3.A1" office:value-type="string">
            <text:p text:style-name="P8">separate</text:p>
          </table:table-cell>
          <table:table-cell table:style-name="Table3.A1" office:value-type="string">
            <text:p text:style-name="P8">task_type</text:p>
          </table:table-cell>
          <table:table-cell table:style-name="Table3.A1" office:value-type="string">
            <text:p text:style-name="P8">0.8</text:p>
          </table:table-cell>
          <table:table-cell table:style-name="Table3.A1" office:value-type="string">
            <text:p text:style-name="P8">0.4607</text:p>
          </table:table-cell>
          <table:table-cell table:style-name="Table3.A1" office:value-type="string">
            <text:p text:style-name="P8">0.5289</text:p>
          </table:table-cell>
          <table:table-cell table:style-name="Table3.A1" office:value-type="string">
            <text:p text:style-name="P8">0.4773</text:p>
          </table:table-cell>
          <table:table-cell table:style-name="Table3.A1" office:value-type="string">
            <text:p text:style-name="P8">0.0</text:p>
          </table:table-cell>
          <table:table-cell table:style-name="Table3.A1" office:value-type="string">
            <text:p text:style-name="P9">1168</text:p>
          </table:table-cell>
        </table:table-row>
        <table:table-row table:style-name="Table3.1">
          <table:table-cell table:style-name="Table3.A1" office:value-type="string">
            <text:p text:style-name="P8">gpt-5.5</text:p>
          </table:table-cell>
          <table:table-cell table:style-name="Table3.A1" office:value-type="string">
            <text:p text:style-name="P8">combined</text:p>
          </table:table-cell>
          <table:table-cell table:style-name="Table3.A1" office:value-type="string">
            <text:p text:style-name="P8">critical</text:p>
          </table:table-cell>
          <table:table-cell table:style-name="Table3.A1" office:value-type="string">
            <text:p text:style-name="P8">0.5</text:p>
          </table:table-cell>
          <table:table-cell table:style-name="Table3.A1" office:value-type="string">
            <text:p text:style-name="P8">0.6429</text:p>
          </table:table-cell>
          <table:table-cell table:style-name="Table3.A1" office:value-type="string">
            <text:p text:style-name="P8">0.6875</text:p>
          </table:table-cell>
          <table:table-cell table:style-name="Table3.A1" office:value-type="string">
            <text:p text:style-name="P8">0.4949</text:p>
          </table:table-cell>
          <table:table-cell table:style-name="Table3.A1" office:value-type="string">
            <text:p text:style-name="P8">0.0</text:p>
          </table:table-cell>
          <table:table-cell table:style-name="Table3.A1" office:value-type="string">
            <text:p text:style-name="P9">5936</text:p>
          </table:table-cell>
        </table:table-row>
        <table:table-row table:style-name="Table3.1">
          <table:table-cell table:style-name="Table3.A1" office:value-type="string">
            <text:p text:style-name="P8">gpt-5.5</text:p>
          </table:table-cell>
          <table:table-cell table:style-name="Table3.A1" office:value-type="string">
            <text:p text:style-name="P8">separate</text:p>
          </table:table-cell>
          <table:table-cell table:style-name="Table3.A1" office:value-type="string">
            <text:p text:style-name="P8">critical</text:p>
          </table:table-cell>
          <table:table-cell table:style-name="Table3.A1" office:value-type="string">
            <text:p text:style-name="P8">0.4333</text:p>
          </table:table-cell>
          <table:table-cell table:style-name="Table3.A1" office:value-type="string">
            <text:p text:style-name="P8">0.6304</text:p>
          </table:table-cell>
          <table:table-cell table:style-name="Table3.A1" office:value-type="string">
            <text:p text:style-name="P8">0.6458</text:p>
          </table:table-cell>
          <table:table-cell table:style-name="Table3.A1" office:value-type="string">
            <text:p text:style-name="P8">0.4327</text:p>
          </table:table-cell>
          <table:table-cell table:style-name="Table3.A1" office:value-type="string">
            <text:p text:style-name="P8">0.0</text:p>
          </table:table-cell>
          <table:table-cell table:style-name="Table3.A1" office:value-type="string">
            <text:p text:style-name="P9">2745</text:p>
          </table:table-cell>
        </table:table-row>
        <table:table-row table:style-name="Table3.1">
          <table:table-cell table:style-name="Table3.A1" office:value-type="string">
            <text:p text:style-name="P8">gpt-5.5</text:p>
          </table:table-cell>
          <table:table-cell table:style-name="Table3.A1" office:value-type="string">
            <text:p text:style-name="P8">combined</text:p>
          </table:table-cell>
          <table:table-cell table:style-name="Table3.A1" office:value-type="string">
            <text:p text:style-name="P8">sentiment</text:p>
          </table:table-cell>
          <table:table-cell table:style-name="Table3.A1" office:value-type="string">
            <text:p text:style-name="P8">0.9333</text:p>
          </table:table-cell>
          <table:table-cell table:style-name="Table3.A1" office:value-type="string">
            <text:p text:style-name="P8">0.8194</text:p>
          </table:table-cell>
          <table:table-cell table:style-name="Table3.A1" office:value-type="string">
            <text:p text:style-name="P8">0.8194</text:p>
          </table:table-cell>
          <table:table-cell table:style-name="Table3.A1" office:value-type="string">
            <text:p text:style-name="P8">0.8194</text:p>
          </table:table-cell>
          <table:table-cell table:style-name="Table3.A1" office:value-type="string">
            <text:p text:style-name="P8">0.0</text:p>
          </table:table-cell>
          <table:table-cell table:style-name="Table3.A1" office:value-type="string">
            <text:p text:style-name="P9">5936</text:p>
          </table:table-cell>
        </table:table-row>
        <table:table-row table:style-name="Table3.1">
          <table:table-cell table:style-name="Table3.A1" office:value-type="string">
            <text:p text:style-name="P8">gpt-5.5</text:p>
          </table:table-cell>
          <table:table-cell table:style-name="Table3.A1" office:value-type="string">
            <text:p text:style-name="P8">separate</text:p>
          </table:table-cell>
          <table:table-cell table:style-name="Table3.A1" office:value-type="string">
            <text:p text:style-name="P8">sentiment</text:p>
          </table:table-cell>
          <table:table-cell table:style-name="Table3.A1" office:value-type="string">
            <text:p text:style-name="P8">0.8667</text:p>
          </table:table-cell>
          <table:table-cell table:style-name="Table3.A1" office:value-type="string">
            <text:p text:style-name="P8">0.75</text:p>
          </table:table-cell>
          <table:table-cell table:style-name="Table3.A1" office:value-type="string">
            <text:p text:style-name="P8">0.7222</text:p>
          </table:table-cell>
          <table:table-cell table:style-name="Table3.A1" office:value-type="string">
            <text:p text:style-name="P8">0.7246</text:p>
          </table:table-cell>
          <table:table-cell table:style-name="Table3.A1" office:value-type="string">
            <text:p text:style-name="P8">0.0</text:p>
          </table:table-cell>
          <table:table-cell table:style-name="Table3.A1" office:value-type="string">
            <text:p text:style-name="P9">3174</text:p>
          </table:table-cell>
        </table:table-row>
        <table:table-row table:style-name="Table3.1">
          <table:table-cell table:style-name="Table3.A1" office:value-type="string">
            <text:p text:style-name="P8">gpt-5.5</text:p>
          </table:table-cell>
          <table:table-cell table:style-name="Table3.A1" office:value-type="string">
            <text:p text:style-name="P8">combined</text:p>
          </table:table-cell>
          <table:table-cell table:style-name="Table3.A1" office:value-type="string">
            <text:p text:style-name="P8">task_type</text:p>
          </table:table-cell>
          <table:table-cell table:style-name="Table3.A1" office:value-type="string">
            <text:p text:style-name="P8">0.9</text:p>
          </table:table-cell>
          <table:table-cell table:style-name="Table3.A1" office:value-type="string">
            <text:p text:style-name="P8">0.72</text:p>
          </table:table-cell>
          <table:table-cell table:style-name="Table3.A1" office:value-type="string">
            <text:p text:style-name="P8">0.6644</text:p>
          </table:table-cell>
          <table:table-cell table:style-name="Table3.A1" office:value-type="string">
            <text:p text:style-name="P8">0.6682</text:p>
          </table:table-cell>
          <table:table-cell table:style-name="Table3.A1" office:value-type="string">
            <text:p text:style-name="P8">0.0</text:p>
          </table:table-cell>
          <table:table-cell table:style-name="Table3.A1" office:value-type="string">
            <text:p text:style-name="P9">5936</text:p>
          </table:table-cell>
        </table:table-row>
        <table:table-row table:style-name="Table3.1">
          <table:table-cell table:style-name="Table3.A1" office:value-type="string">
            <text:p text:style-name="P8">gpt-5.5</text:p>
          </table:table-cell>
          <table:table-cell table:style-name="Table3.A1" office:value-type="string">
            <text:p text:style-name="P8">separate</text:p>
          </table:table-cell>
          <table:table-cell table:style-name="Table3.A1" office:value-type="string">
            <text:p text:style-name="P8">task_type</text:p>
          </table:table-cell>
          <table:table-cell table:style-name="Table3.A1" office:value-type="string">
            <text:p text:style-name="P8">0.8333</text:p>
          </table:table-cell>
          <table:table-cell table:style-name="Table3.A1" office:value-type="string">
            <text:p text:style-name="P8">0.4893</text:p>
          </table:table-cell>
          <table:table-cell table:style-name="Table3.A1" office:value-type="string">
            <text:p text:style-name="P8">0.5422</text:p>
          </table:table-cell>
          <table:table-cell table:style-name="Table3.A1" office:value-type="string">
            <text:p text:style-name="P8">0.5011</text:p>
          </table:table-cell>
          <table:table-cell table:style-name="Table3.A1" office:value-type="string">
            <text:p text:style-name="P8">0.0</text:p>
          </table:table-cell>
          <table:table-cell table:style-name="Table3.A1" office:value-type="string">
            <text:p text:style-name="P9">3242</text:p>
          </table:table-cell>
        </table:table-row>
      </table:table>
      <text:p text:style-name="Standard"/>
      <text:p text:style-name="P5"/>
      <text:p text:style-name="P5">Modell <text:s text:c="14"/>Aufgabe <text:s text:c="6"/>F1 Separat <text:s/>F1 Kombiniert <text:s text:c="4"/>Δ F1</text:p>
      <text:p text:style-name="P5">----------------------------------------------------------------------</text:p>
      <text:p text:style-name="P5">gpt-5.4-mini <text:s text:c="8"/>task_type <text:s text:c="8"/>0.4773 <text:s text:c="8"/>0.4733 ▼ 0.0040</text:p>
      <text:p text:style-name="P5">gpt-5.4-mini <text:s text:c="8"/>sentiment <text:s text:c="8"/>0.4118 <text:s text:c="8"/>0.4911 ▲ 0.0793</text:p>
      <text:p text:style-name="P5">gpt-5.4-mini <text:s text:c="8"/>critical <text:s text:c="9"/>0.4643 <text:s text:c="8"/>0.4276 ▼ 0.0367</text:p>
      <text:p text:style-name="P5">gpt-5.5 <text:s text:c="13"/>task_type <text:s text:c="8"/>0.5011 <text:s text:c="8"/>0.6682 ▲ 0.1671</text:p>
      <text:p text:style-name="P5">gpt-5.5 <text:s text:c="13"/>sentiment <text:s text:c="8"/>0.7246 <text:s text:c="8"/>0.8194 ▲ 0.0948</text:p>
      <text:p text:style-name="P5">gpt-5.5 <text:s text:c="13"/>critical <text:s text:c="9"/>0.4327 <text:s text:c="8"/>0.4949 ▲ 0.0622</text:p>
      <text:p text:style-name="P5"/>
      <text:p text:style-name="P6"/>
      <text:p text:style-name="P5"># Separate Prompts</text:p>
      <text:p text:style-name="P5">prompt_task = ChatPromptTemplate.from_messages([</text:p>
      <text:p text:style-name="P5"><text:s text:c="4"/>("system", """Du bist ein Klassifikationssystem. Analysiere das folgende Chat-Log und bestimme,</text:p>
      <text:p text:style-name="P5">welcher Aufgabentyp in diesem Chat vorhanden ist. Wenn mehrer Aufgabentypen vorkommen, wähle den dominanten.</text:p>
      <text:p text:style-name="P5"/>
      <text:p text:style-name="P5">Aufgabentyp:</text:p>
      <text:p text:style-name="P5">(1) Informationssuche und Verständnis, z. B. um Literaturhinweise, Suchbegriffe oder Rechercheansätze zu erhalten, Theorien und Konzepte erklären zu lassen oder Verständnisfragen zu Studieninhalten zu klären.</text:p>
      <text:p text:style-name="P5"/>
      <text:p text:style-name="P5">(2) "Schreiben und Textarbeit", z. B. um Feedback zu eigenen Texten zu erhalten, Gliederungen zu erstellen, Texte zusammenfassen zu lassen, Textbausteine oder Formulierungsvorschläge zu erstellen oder Texte zu übersetzen bzw. sprachlich zu überarbeiten.</text:p>
      <text:p text:style-name="P5"/>
      <text:p text:style-name="P5">(3) "Praktische Unterstützung und Strukturierung", z. B. um Ideen für eine Hausarbeit, einen Essay oder eine Präsentation zu entwickeln, ein Projekt zu strukturieren, nächste Arbeitsschritte zu planen oder Unterstützung bei Problemlösung und Entscheidungsfindung zu erhalten.</text:p>
      <text:p text:style-name="P5"/>
      <text:p text:style-name="P5">(4) "Technische und analytische Unterstützung", z. B. um Code zu erstellen oder zu überarbeiten, Datenanalysen oder Datenvisualisierungen vorzubereiten oder Ergebnisse aus Statistik- und Analyseprogrammen wie R, Stata oder SPSS interpretieren zu lassen.</text:p>
      <text:p text:style-name="P5"/>
      <text:p text:style-name="P5">(5) "Lernen und Prüfungsvorbereitung", z. B. um sich auf Prüfungen vorzubereiten oder Lernfragen, Übungsaufgaben oder Karteikarten zu erstellen.</text:p>
      <text:p text:style-name="P5"/>
      <text:p text:style-name="P5">Antworte NUR mit EINEM der folgenden Labels (exakt so):</text:p>
      <text:p text:style-name="P5">{labels}"""),</text:p>
      <text:p text:style-name="P5"><text:s text:c="4"/>("human", "Chat-Log:\n{text}\n"),</text:p>
      <text:p text:style-name="P5">]).partial(labels=" | ".join(LABELS_TASK))</text:p>
      <text:p text:style-name="P5"/>
      <text:p text:style-name="P5">prompt_sentiment = ChatPromptTemplate.from_messages([</text:p>
      <text:p text:style-name="P5"><text:s text:c="4"/>("system", """Du bist ein Klassifikationssystem für akademische Chat-Logs.</text:p>
      <text:p text:style-name="P5"/>
      <text:p text:style-name="P5">Analysiere den Kommunikationsstil der Person im folgenden Chat-Log.</text:p>
      <text:p text:style-name="P5">Beachte: Es handelt sich um Studierende die ChatGPT für akademische Aufgaben nutzen.</text:p>
      <text:p text:style-name="P5">Der Großteil der Chats ist neutral-sachlich — sei bei der Vergabe von "Freundlich"</text:p>
      <text:p text:style-name="P5">und "Unfreundlich" konservativ.</text:p>
      <text:p text:style-name="P5"/>
      <text:p text:style-name="P5">Vergib "Unfreundlich" wenn die Person:</text:p>
      <text:p text:style-name="P5">- Sehr kurze, befehlsartige Nachrichten schreibt</text:p>
      <text:p text:style-name="P5">- Ungeduld oder Frustration zeigt</text:p>
      <text:p text:style-name="P5">- fordernd oder abweisend wirkt</text:p>
      <text:p text:style-name="P5"/>
      <text:p text:style-name="P5">Vergib "Freundlich" <text:s/>wenn die Person:</text:p>
      <text:p text:style-name="P5">- Begrüßungen verwendet</text:p>
      <text:p text:style-name="P5">- Explizit "bitte" oder "danke" schreibt</text:p>
      <text:p text:style-name="P5">- Wertschätzung oder positive Rückmeldung ausdrückt</text:p>
      <text:p text:style-name="P5"/>
      <text:p text:style-name="P5">Vergib "Neutral" <text:s/>die Person:</text:p>
      <text:p text:style-name="P5"><text:soft-page-break/>- Sachlich und aufgabenorientiert schreibt</text:p>
      <text:p text:style-name="P5">- Technische Fragen oder Code ohne emotionalen Ton stellt</text:p>
      <text:p text:style-name="P5">- Direkt zur Sache kommt ohne besondere Freundlichkeit oder Unfreundlichkeit</text:p>
      <text:p text:style-name="P5">- Im Zweifel: Neutral ist der Standard für akademisch-technische Chats</text:p>
      <text:p text:style-name="P5"/>
      <text:p text:style-name="P5">Antworte NUR mit EINEM der folgenden Labels (exakt so):</text:p>
      <text:p text:style-name="P5">{labels}"""),</text:p>
      <text:p text:style-name="P5"><text:s text:c="4"/>("human", "Chat-Log:\n{text}"),</text:p>
      <text:p text:style-name="P5">]).partial(labels=" | ".join(LABELS_SENTIMENT))</text:p>
      <text:p text:style-name="P5"/>
      <text:p text:style-name="P5"/>
      <text:p text:style-name="P5">prompt_critical = ChatPromptTemplate.from_messages([</text:p>
      <text:p text:style-name="P5"><text:s text:c="4"/>("system", """Du bist ein Klassifikationssystem für akademische Chat-Logs.</text:p>
      <text:p text:style-name="P5">Deine Aufgabe ist es zu bestimmen, ob die Person die KI-Antworten aktiv</text:p>
      <text:p text:style-name="P5">überprüft oder hinterfragt, anstatt sie einfach zu übernehmen.</text:p>
      <text:p text:style-name="P5"/>
      <text:p text:style-name="P5">Analysiere das Chat-Log in drei Schritten:</text:p>
      <text:p text:style-name="P5"/>
      <text:p text:style-name="P5">SCHRITT 1 – Prüfe ob die Person eines der folgenden Signale zeigt:</text:p>
      <text:p text:style-name="P5"><text:s text:c="2"/>(a) Meldet einen Fehler in der KI-Antwort ("das stimmt nicht", "Error", "funktioniert nicht")</text:p>
      <text:p text:style-name="P5"><text:s text:c="2"/>(b) Hinterfragt ein Ergebnis direkt ("warum", "bist du sicher", "wie lange dauert das wirklich")</text:p>
      <text:p text:style-name="P5"><text:s text:c="2"/>(c) Korrigiert oder verfeinert eine vorherige Antwort iterativ</text:p>
      <text:p text:style-name="P5"><text:s text:c="2"/>(d) Bittet explizit um Quellen, Belege oder Gegenargumente</text:p>
      <text:p text:style-name="P5"><text:s text:c="2"/>(e) Gibt die KI-Antwort als neuen Input zurück um sie weiterzuverarbeiten</text:p>
      <text:p text:style-name="P5"/>
      <text:p text:style-name="P5">SCHRITT 2 – Prüfe Gegenargumente:</text:p>
      <text:p text:style-name="P5"><text:s text:c="2"/>Könnte das Signal auch einfach eine neue unabhängige Frage sein?</text:p>
      <text:p text:style-name="P5"><text:s text:c="2"/>Delegiert die Person nur neue Aufgaben ohne frühere Antworten zu bewerten?</text:p>
      <text:p text:style-name="P5"/>
      <text:p text:style-name="P5">SCHRITT 3 – Entscheide durch Abwägung:</text:p>
      <text:p text:style-name="P5"><text:s text:c="2"/>Vergib "Ja" nur wenn:</text:p>
      <text:p text:style-name="P5"><text:s text:c="4"/>- Mindestens ein Signal aus Schritt 1 vorliegt UND</text:p>
      <text:p text:style-name="P5"><text:s text:c="4"/>- Das Signal aus Schritt 2 klar als Überprüfung erkennbar ist</text:p>
      <text:p text:style-name="P5"><text:s text:c="6"/>und NICHT als neue unabhängige Aufgabe erklärbar ist</text:p>
      <text:p text:style-name="P5"><text:s text:c="2"/>Vergib "Nein" wenn:</text:p>
      <text:p text:style-name="P5"><text:s text:c="4"/>- Kein Signal aus Schritt 1 vorliegt ODER</text:p>
      <text:p text:style-name="P5"><text:s text:c="4"/>- Das Signal aus Schritt 1 durch Schritt 2 entkräftet wird,</text:p>
      <text:p text:style-name="P5"><text:s text:c="6"/>weil es sich um eine neue unabhängige Frage handelt</text:p>
      <text:p text:style-name="P5"/>
      <text:p text:style-name="P5">Antworte NUR mit EINEM der folgenden Labels (exakt so):</text:p>
      <text:p text:style-name="P5">{labels}"""),</text:p>
      <text:p text:style-name="P5"><text:s text:c="4"/>("human", "Chat-Log:\n{text}"),</text:p>
      <text:p text:style-name="P5">]).partial(labels=" | ".join(LABELS_CRITICAL))</text:p>
      <text:p text:style-name="P5"/>
      <text:p text:style-name="P5"># Kombinierter Prompt</text:p>
      <text:p text:style-name="P5">prompt_combined = ChatPromptTemplate.from_messages([</text:p>
      <text:p text:style-name="P5"><text:s text:c="4"/>("system", """Du bist ein Klassifikationssystem für akademische Chat-Logs.</text:p>
      <text:p text:style-name="P5">Analysiere das folgende Chat-Log und klassifiziere es nach drei Kriterien.</text:p>
      <text:p text:style-name="P5"/>
      <text:p text:style-name="P5">KRITERIUM 1 – Aufgabentyp:</text:p>
      <text:p text:style-name="P5"><text:soft-page-break/>(1) Informationssuche und Verständnis, z. B. um Literaturhinweise, Suchbegriffe oder Rechercheansätze zu erhalten, Theorien und Konzepte erklären zu lassen oder Verständnisfragen zu Studieninhalten zu klären.</text:p>
      <text:p text:style-name="P5"/>
      <text:p text:style-name="P5">(2) Schreiben und Textarbeit, z. B. um Feedback zu eigenen Texten zu erhalten, Gliederungen zu erstellen, Texte zusammenfassen zu lassen, Textbausteine oder Formulierungsvorschläge zu erstellen oder Texte zu übersetzen bzw. sprachlich zu überarbeiten.</text:p>
      <text:p text:style-name="P5"/>
      <text:p text:style-name="P5">(3) Praktische Unterstützung und Strukturierung, z. B. um Ideen für eine Hausarbeit, einen Essay oder eine Präsentation zu entwickeln, ein Projekt zu strukturieren, nächste Arbeitsschritte zu planen oder Unterstützung bei Problemlösung und Entscheidungsfindung zu erhalten.</text:p>
      <text:p text:style-name="P5"/>
      <text:p text:style-name="P5">(4) Technische und analytische Unterstützung, z. B. um Code zu erstellen oder zu überarbeiten, Datenanalysen oder Datenvisualisierungen vorzubereiten oder Ergebnisse aus Statistik- und Analyseprogrammen wie R, Stata oder SPSS interpretieren zu lassen.</text:p>
      <text:p text:style-name="P5"/>
      <text:p text:style-name="P5">(5) Lernen und Prüfungsvorbereitung, z. B. um sich auf Prüfungen vorzubereiten oder Lernfragen, Übungsaufgaben oder Karteikarten zu erstellen.</text:p>
      <text:p text:style-name="P5"/>
      <text:p text:style-name="P5">KRITERIUM 2 – Ton/Sentiment:</text:p>
      <text:p text:style-name="P5">Bewerte den Ton als:</text:p>
      <text:p text:style-name="P5"/>
      <text:p text:style-name="P5">"Unfreundlich" wenn die Person:</text:p>
      <text:p text:style-name="P5">- Sehr kurze, befehlsartige Nachrichten schreibt</text:p>
      <text:p text:style-name="P5">- Ungeduld oder Frustration zeigt</text:p>
      <text:p text:style-name="P5">- fordernd oder abweisend wirkt</text:p>
      <text:p text:style-name="P5"/>
      <text:p text:style-name="P5"><text:s/>"Freundlich" <text:s/>wenn die Person:</text:p>
      <text:p text:style-name="P5">- Begrüßungen verwendet</text:p>
      <text:p text:style-name="P5">- Explizit "bitte" oder "danke" schreibt</text:p>
      <text:p text:style-name="P5">- Wertschätzung oder positive Rückmeldung ausdrückt</text:p>
      <text:p text:style-name="P5"/>
      <text:p text:style-name="P5">"Neutral" <text:s/>die Person:</text:p>
      <text:p text:style-name="P5">- Sachlich und aufgabenorientiert schreibt</text:p>
      <text:p text:style-name="P5">- Technische Fragen oder Code ohne emotionalen Ton stellt</text:p>
      <text:p text:style-name="P5">- Direkt zur Sache kommt ohne besondere Freundlichkeit oder Unfreundlichkeit</text:p>
      <text:p text:style-name="P5">- Im Zweifel: Neutral ist der Standard für akademisch-technische Chats</text:p>
      <text:p text:style-name="P5"/>
      <text:p text:style-name="P5">KRITERIUM 3 – Kritische Überprüfung:</text:p>
      <text:p text:style-name="P5">Überprüft oder hinterfragt die Person die KI-Antworten, anstatt sie einfach zu übernehmen.</text:p>
      <text:p text:style-name="P5">Gehe dabei in drei Schritten vor:</text:p>
      <text:p text:style-name="P5"/>
      <text:p text:style-name="P5">SCHRITT 1 – Prüfe ob die Person eines der folgenden Signale zeigt:</text:p>
      <text:p text:style-name="P5"><text:s text:c="2"/>(a) Meldet einen Fehler in der KI-Antwort</text:p>
      <text:p text:style-name="P5"><text:s text:c="2"/>(b) Hinterfragt ein Ergebnis direkt</text:p>
      <text:p text:style-name="P5"><text:s text:c="2"/>(c) Korrigiert oder verfeinert eine vorherige Antwort iterativ</text:p>
      <text:p text:style-name="P5"><text:s text:c="2"/>(d) Bittet explizit um Quellen, Belege oder Gegenargumente</text:p>
      <text:p text:style-name="P5"><text:s text:c="2"/>(e) Gibt die KI-Antwort als neuen Input zurück um sie weiterzuverarbeiten</text:p>
      <text:p text:style-name="P5"/>
      <text:p text:style-name="P5">SCHRITT 2 – Prüfe Gegenargumente:</text:p>
      <text:p text:style-name="P5"><text:s text:c="2"/>Könnte das Signal auch einfach eine neue unabhängige Frage sein?</text:p>
      <text:p text:style-name="P5"><text:s text:c="2"/>Delegiert die Person nur neue Aufgaben ohne frühere Antworten zu bewerten?</text:p>
      <text:p text:style-name="P5"><text:soft-page-break/></text:p>
      <text:p text:style-name="P5">SCHRITT 3 – Entscheide durch Abwägung:</text:p>
      <text:p text:style-name="P5"><text:s text:c="2"/>Vergib "Ja" nur wenn:</text:p>
      <text:p text:style-name="P5"><text:s text:c="4"/>- Mindestens ein Signal aus Schritt 1 vorliegt UND</text:p>
      <text:p text:style-name="P5"><text:s text:c="4"/>- Das Signal aus Schritt 2 klar als Überprüfung erkennbar ist</text:p>
      <text:p text:style-name="P5"><text:s text:c="6"/>und NICHT als neue unabhängige Aufgabe erklärbar ist</text:p>
      <text:p text:style-name="P5"><text:s text:c="2"/>Vergib "Nein" wenn:</text:p>
      <text:p text:style-name="P5"><text:s text:c="4"/>- Kein Signal aus Schritt 1 vorliegt ODER</text:p>
      <text:p text:style-name="P5"><text:s text:c="4"/>- Das Signal aus Schritt 1 durch Schritt 2 entkräftet wird,</text:p>
      <text:p text:style-name="P5"><text:s text:c="6"/>weil es sich um eine neue unabhängige Frage handelt</text:p>
      <text:p text:style-name="P5"/>
      <text:p text:style-name="P5"/>
      <text:p text:style-name="P5">Antworte NUR in diesem exakten Format (drei Zeilen, nichts anderes):</text:p>
      <text:p text:style-name="P5">TASK: &lt;Label&gt;</text:p>
      <text:p text:style-name="P5">SENTIMENT: &lt;Label&gt;</text:p>
      <text:p text:style-name="P5">CRITICAL: &lt;Label&gt;"""),</text:p>
      <text:p text:style-name="P5"><text:s text:c="4"/>("human", "Chat-Log:\n{text}"),</text:p>
      <text:p text:style-name="P5">])</text:p>
      <text:p text:style-name="P5"/>
      <text:p text:style-name="P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office:value-type="string">
            <text:p text:style-name="P7">Modell</text:p>
          </table:table-cell>
          <table:table-cell table:style-name="Table4.A1" office:value-type="string">
            <text:p text:style-name="P7">Strategie</text:p>
          </table:table-cell>
          <table:table-cell table:style-name="Table4.A1" office:value-type="string">
            <text:p text:style-name="P7">Aufgabe</text:p>
          </table:table-cell>
          <table:table-cell table:style-name="Table4.A1" office:value-type="string">
            <text:p text:style-name="P7">Accuracy</text:p>
          </table:table-cell>
          <table:table-cell table:style-name="Table4.A1" office:value-type="string">
            <text:p text:style-name="P7">Precision</text:p>
          </table:table-cell>
          <table:table-cell table:style-name="Table4.A1" office:value-type="string">
            <text:p text:style-name="P7">Recall</text:p>
          </table:table-cell>
          <table:table-cell table:style-name="Table4.A1" office:value-type="string">
            <text:p text:style-name="P7">F1 (macro)</text:p>
          </table:table-cell>
          <table:table-cell table:style-name="Table4.A1" office:value-type="string">
            <text:p text:style-name="P7">Unknown-Rate</text:p>
          </table:table-cell>
          <table:table-cell table:style-name="Table4.A1" office:value-type="string">
            <text:p text:style-name="P7">Latenz (s)</text:p>
          </table:table-cell>
        </table:table-row>
        <table:table-row table:style-name="Table4.1">
          <table:table-cell table:style-name="Table4.A1" office:value-type="string">
            <text:p text:style-name="P7">gpt-5.5</text:p>
          </table:table-cell>
          <table:table-cell table:style-name="Table4.A1" office:value-type="string">
            <text:p text:style-name="P8">combined</text:p>
          </table:table-cell>
          <table:table-cell table:style-name="Table4.A1" office:value-type="string">
            <text:p text:style-name="P8">critical</text:p>
          </table:table-cell>
          <table:table-cell table:style-name="Table4.A1" office:value-type="string">
            <text:p text:style-name="P8">0.8667</text:p>
          </table:table-cell>
          <table:table-cell table:style-name="Table4.A1" office:value-type="string">
            <text:p text:style-name="P8">0.7898</text:p>
          </table:table-cell>
          <table:table-cell table:style-name="Table4.A1" office:value-type="string">
            <text:p text:style-name="P8">0.8542</text:p>
          </table:table-cell>
          <table:table-cell table:style-name="Table4.A1" office:value-type="string">
            <text:p text:style-name="P8">0.8137</text:p>
          </table:table-cell>
          <table:table-cell table:style-name="Table4.A1" office:value-type="string">
            <text:p text:style-name="P8">0.0</text:p>
          </table:table-cell>
          <table:table-cell table:style-name="Table4.A1" office:value-type="string">
            <text:p text:style-name="P9">7246</text:p>
          </table:table-cell>
        </table:table-row>
        <table:table-row table:style-name="Table4.1">
          <table:table-cell table:style-name="Table4.A1" office:value-type="string">
            <text:p text:style-name="P7">gpt-5.5</text:p>
          </table:table-cell>
          <table:table-cell table:style-name="Table4.A1" office:value-type="string">
            <text:p text:style-name="P8">separate</text:p>
          </table:table-cell>
          <table:table-cell table:style-name="Table4.A1" office:value-type="string">
            <text:p text:style-name="P8">critical</text:p>
          </table:table-cell>
          <table:table-cell table:style-name="Table4.A1" office:value-type="string">
            <text:p text:style-name="P8">0.7667</text:p>
          </table:table-cell>
          <table:table-cell table:style-name="Table4.A1" office:value-type="string">
            <text:p text:style-name="P9">701</text:p>
          </table:table-cell>
          <table:table-cell table:style-name="Table4.A1" office:value-type="string">
            <text:p text:style-name="P8">0.7917</text:p>
          </table:table-cell>
          <table:table-cell table:style-name="Table4.A1" office:value-type="string">
            <text:p text:style-name="P8">0.7127</text:p>
          </table:table-cell>
          <table:table-cell table:style-name="Table4.A1" office:value-type="string">
            <text:p text:style-name="P8">0.0</text:p>
          </table:table-cell>
          <table:table-cell table:style-name="Table4.A1" office:value-type="string">
            <text:p text:style-name="P9">4503</text:p>
          </table:table-cell>
        </table:table-row>
        <table:table-row table:style-name="Table4.1">
          <table:table-cell table:style-name="Table4.A1" office:value-type="string">
            <text:p text:style-name="P7">gpt-5.5</text:p>
          </table:table-cell>
          <table:table-cell table:style-name="Table4.A1" office:value-type="string">
            <text:p text:style-name="P8">combined</text:p>
          </table:table-cell>
          <table:table-cell table:style-name="Table4.A1" office:value-type="string">
            <text:p text:style-name="P8">sentiment</text:p>
          </table:table-cell>
          <table:table-cell table:style-name="Table4.A1" office:value-type="string">
            <text:p text:style-name="P8">0.9</text:p>
          </table:table-cell>
          <table:table-cell table:style-name="Table4.A1" office:value-type="string">
            <text:p text:style-name="P8">0.7522</text:p>
          </table:table-cell>
          <table:table-cell table:style-name="Table4.A1" office:value-type="string">
            <text:p text:style-name="P8">0.8056</text:p>
          </table:table-cell>
          <table:table-cell table:style-name="Table4.A1" office:value-type="string">
            <text:p text:style-name="P9">775</text:p>
          </table:table-cell>
          <table:table-cell table:style-name="Table4.A1" office:value-type="string">
            <text:p text:style-name="P8">0.0</text:p>
          </table:table-cell>
          <table:table-cell table:style-name="Table4.A1" office:value-type="string">
            <text:p text:style-name="P9">7246</text:p>
          </table:table-cell>
        </table:table-row>
        <table:table-row table:style-name="Table4.1">
          <table:table-cell table:style-name="Table4.A1" office:value-type="string">
            <text:p text:style-name="P7">gpt-5.5</text:p>
          </table:table-cell>
          <table:table-cell table:style-name="Table4.A1" office:value-type="string">
            <text:p text:style-name="P8">separate</text:p>
          </table:table-cell>
          <table:table-cell table:style-name="Table4.A1" office:value-type="string">
            <text:p text:style-name="P8">sentiment</text:p>
          </table:table-cell>
          <table:table-cell table:style-name="Table4.A1" office:value-type="string">
            <text:p text:style-name="P8">0.9333</text:p>
          </table:table-cell>
          <table:table-cell table:style-name="Table4.A1" office:value-type="string">
            <text:p text:style-name="P8">0.9194</text:p>
          </table:table-cell>
          <table:table-cell table:style-name="Table4.A1" office:value-type="string">
            <text:p text:style-name="P8">0.8194</text:p>
          </table:table-cell>
          <table:table-cell table:style-name="Table4.A1" office:value-type="string">
            <text:p text:style-name="P9">838</text:p>
          </table:table-cell>
          <table:table-cell table:style-name="Table4.A1" office:value-type="string">
            <text:p text:style-name="P8">0.0</text:p>
          </table:table-cell>
          <table:table-cell table:style-name="Table4.A1" office:value-type="string">
            <text:p text:style-name="P8">2.78</text:p>
          </table:table-cell>
        </table:table-row>
        <table:table-row table:style-name="Table4.1">
          <table:table-cell table:style-name="Table4.A1" office:value-type="string">
            <text:p text:style-name="P7">gpt-5.5</text:p>
          </table:table-cell>
          <table:table-cell table:style-name="Table4.A1" office:value-type="string">
            <text:p text:style-name="P8">combined</text:p>
          </table:table-cell>
          <table:table-cell table:style-name="Table4.A1" office:value-type="string">
            <text:p text:style-name="P8">task_type</text:p>
          </table:table-cell>
          <table:table-cell table:style-name="Table4.A1" office:value-type="string">
            <text:p text:style-name="P8">0.9</text:p>
          </table:table-cell>
          <table:table-cell table:style-name="Table4.A1" office:value-type="string">
            <text:p text:style-name="P8">0.72</text:p>
          </table:table-cell>
          <table:table-cell table:style-name="Table4.A1" office:value-type="string">
            <text:p text:style-name="P8">0.6644</text:p>
          </table:table-cell>
          <table:table-cell table:style-name="Table4.A1" office:value-type="string">
            <text:p text:style-name="P8">0.6682</text:p>
          </table:table-cell>
          <table:table-cell table:style-name="Table4.A1" office:value-type="string">
            <text:p text:style-name="P8">0.0</text:p>
          </table:table-cell>
          <table:table-cell table:style-name="Table4.A1" office:value-type="string">
            <text:p text:style-name="P9">7246</text:p>
          </table:table-cell>
        </table:table-row>
        <table:table-row table:style-name="Table4.1">
          <table:table-cell table:style-name="Table4.A1" office:value-type="string">
            <text:p text:style-name="P7">gpt-5.5</text:p>
          </table:table-cell>
          <table:table-cell table:style-name="Table4.A1" office:value-type="string">
            <text:p text:style-name="P8">separate</text:p>
          </table:table-cell>
          <table:table-cell table:style-name="Table4.A1" office:value-type="string">
            <text:p text:style-name="P8">task_type</text:p>
          </table:table-cell>
          <table:table-cell table:style-name="Table4.A1" office:value-type="string">
            <text:p text:style-name="P8">0.8667</text:p>
          </table:table-cell>
          <table:table-cell table:style-name="Table4.A1" office:value-type="string">
            <text:p text:style-name="P8">0.7083</text:p>
          </table:table-cell>
          <table:table-cell table:style-name="Table4.A1" office:value-type="string">
            <text:p text:style-name="P8">0.6422</text:p>
          </table:table-cell>
          <table:table-cell table:style-name="Table4.A1" office:value-type="string">
            <text:p text:style-name="P9">649</text:p>
          </table:table-cell>
          <table:table-cell table:style-name="Table4.A1" office:value-type="string">
            <text:p text:style-name="P8">0.0</text:p>
          </table:table-cell>
          <table:table-cell table:style-name="Table4.A1" office:value-type="string">
            <text:p text:style-name="P9">3343</text:p>
          </table:table-cell>
        </table:table-row>
      </table:table>
      <text:p text:style-name="Standard"/>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29T12:23:49.160801440</meta:creation-date>
    <dc:date>2026-06-29T18:03:46.331880574</dc:date>
    <meta:editing-duration>PT2H37M1S</meta:editing-duration>
    <meta:editing-cycles>3</meta:editing-cycles>
    <meta:generator>LibreOffice/24.2.7.2$Linux_X86_64 LibreOffice_project/420$Build-2</meta:generator>
    <meta:document-statistic meta:table-count="4" meta:image-count="0" meta:object-count="0" meta:page-count="14" meta:paragraph-count="873" meta:word-count="3280" meta:character-count="25680" meta:non-whitespace-character-count="22581"/>
  </office:meta>
</office:document-meta>
</file>